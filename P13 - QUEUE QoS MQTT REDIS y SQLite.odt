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3000003CDCBCABA29.png" manifest:media-type="image/png"/>
  <manifest:file-entry manifest:full-path="Pictures/1000000100000293000002974CFA18B9.png" manifest:media-type="image/png"/>
  <manifest:file-entry manifest:full-path="Pictures/10000001000002930000029749D3FFFD.png" manifest:media-type="image/png"/>
  <manifest:file-entry manifest:full-path="Pictures/100000000000012C0000005AEAF22963.png" manifest:media-type="image/png"/>
  <manifest:file-entry manifest:full-path="Pictures/10000000000001900000019068EC48D7.png" manifest:media-type="image/png"/>
  <manifest:file-entry manifest:full-path="Pictures/10000000000004000000024C6A7798AC.png" manifest:media-type="image/png"/>
  <manifest:file-entry manifest:full-path="Pictures/100000000000055600000300DE7EFF04.png" manifest:media-type="image/png"/>
  <manifest:file-entry manifest:full-path="Pictures/100000000000055600000300C3CACEDF.png" manifest:media-type="image/png"/>
  <manifest:file-entry manifest:full-path="Pictures/100000000000055600000300CB1B8BDC.png" manifest:media-type="image/png"/>
  <manifest:file-entry manifest:full-path="Pictures/1000000000000556000003006AC24F39.png" manifest:media-type="image/png"/>
  <manifest:file-entry manifest:full-path="Pictures/100000010000029300000297EA357996.png" manifest:media-type="image/png"/>
  <manifest:file-entry manifest:full-path="Pictures/100000000000055600000300FF263616.png" manifest:media-type="image/png"/>
  <manifest:file-entry manifest:full-path="Pictures/100000000000055600000300C0C654FC.png" manifest:media-type="image/png"/>
  <manifest:file-entry manifest:full-path="Pictures/1000000000000556000003007B330089.png" manifest:media-type="image/png"/>
  <manifest:file-entry manifest:full-path="Pictures/10000000000005560000030073E99F21.png" manifest:media-type="image/png"/>
  <manifest:file-entry manifest:full-path="Pictures/10000001000002B3000002B952556E70.png" manifest:media-type="image/png"/>
  <manifest:file-entry manifest:full-path="Pictures/10000001000002B3000002B9DDFF7B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rial" svg:font-family="Arrial"/>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Heading_20_3">
      <style:paragraph-properties fo:text-align="start" style:justify-single-word="false"/>
      <style:text-properties fo:font-weight="bold" officeooo:paragraph-rsid="001937df"/>
    </style:style>
    <style:style style:name="P3" style:family="paragraph" style:parent-style-name="Heading_20_3">
      <style:paragraph-properties fo:text-align="start" style:justify-single-word="false"/>
      <style:text-properties fo:font-weight="bold" officeooo:paragraph-rsid="0048967a"/>
    </style:style>
    <style:style style:name="P4" style:family="paragraph" style:parent-style-name="Heading_20_4">
      <style:paragraph-properties fo:text-align="start" style:justify-single-word="false"/>
      <style:text-properties fo:font-weight="bold" officeooo:paragraph-rsid="001937df"/>
    </style:style>
    <style:style style:name="P5" style:family="paragraph" style:parent-style-name="Heading_20_4">
      <style:paragraph-properties fo:text-align="start" style:justify-single-word="false"/>
      <style:text-properties fo:font-weight="bold" officeooo:paragraph-rsid="0048967a"/>
    </style:style>
    <style:style style:name="P6" style:family="paragraph" style:parent-style-name="Heading_20_4">
      <style:paragraph-properties fo:text-align="start" style:justify-single-word="false"/>
      <style:text-properties style:font-name="Arial1" fo:font-weight="bold" officeooo:paragraph-rsid="001937df"/>
    </style:style>
    <style:style style:name="P7" style:family="paragraph" style:parent-style-name="Heading_20_4">
      <style:paragraph-properties fo:text-align="start" style:justify-single-word="false"/>
      <style:text-properties style:font-name="Arial1" fo:font-weight="bold" officeooo:paragraph-rsid="0048967a"/>
    </style:style>
    <style:style style:name="P8" style:family="paragraph" style:parent-style-name="Heading_20_4">
      <style:paragraph-properties fo:margin-left="0cm" fo:margin-right="0cm" fo:margin-top="0cm" fo:margin-bottom="0.212cm" style:contextual-spacing="false" fo:line-height="114%" fo:text-indent="0cm" style:auto-text-indent="false"/>
      <style:text-properties style:font-name="Arial1" fo:font-size="15pt" fo:font-weight="bold" style:font-size-asian="15pt" style:font-size-complex="15pt"/>
    </style:style>
    <style:style style:name="P9" style:family="paragraph" style:parent-style-name="Heading_20_4">
      <style:text-properties style:font-name="Arial1"/>
    </style:style>
    <style:style style:name="P10" style:family="paragraph" style:parent-style-name="Heading_20_5">
      <style:paragraph-properties fo:text-align="start" style:justify-single-word="false"/>
      <style:text-properties style:font-name="Arial1" fo:font-size="13pt" fo:font-weight="bold" officeooo:paragraph-rsid="003e3e13" style:font-size-asian="13pt" style:font-size-complex="13pt"/>
    </style:style>
    <style:style style:name="P11" style:family="paragraph" style:parent-style-name="Heading_20_5">
      <style:paragraph-properties fo:margin-top="0.494cm" fo:margin-bottom="0.494cm" style:contextual-spacing="false" fo:line-height="100%" fo:text-align="start" style:justify-single-word="false"/>
      <style:text-properties style:font-name="Arial1" officeooo:rsid="002d4f5c" officeooo:paragraph-rsid="002d4f5c"/>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text-properties officeooo:paragraph-rsid="003f82bc"/>
    </style:style>
    <style:style style:name="P14" style:family="paragraph" style:parent-style-name="Preformatted_20_Text" style:list-style-name="L9">
      <style:paragraph-properties fo:margin-top="0cm" fo:margin-bottom="0.499cm" style:contextual-spacing="false"/>
    </style:style>
    <style:style style:name="P15" style:family="paragraph" style:parent-style-name="Preformatted_20_Text" style:list-style-name="L9">
      <style:paragraph-properties fo:margin-top="0cm" fo:margin-bottom="0.499cm" style:contextual-spacing="false"/>
      <style:text-properties officeooo:paragraph-rsid="0048967a"/>
    </style:style>
    <style:style style:name="P16" style:family="paragraph" style:parent-style-name="Preformatted_20_Text" style:list-style-name="L11">
      <style:paragraph-properties fo:margin-top="0cm" fo:margin-bottom="0.499cm" style:contextual-spacing="false"/>
      <style:text-properties officeooo:paragraph-rsid="004a251f"/>
    </style:style>
    <style:style style:name="P17" style:family="paragraph" style:parent-style-name="Standard">
      <style:paragraph-properties fo:margin-top="0.494cm" fo:margin-bottom="0.494cm" style:contextual-spacing="false" fo:line-height="100%" fo:text-align="start" style:justify-single-word="false"/>
      <style:text-properties officeooo:paragraph-rsid="002d4f5c"/>
    </style:style>
    <style:style style:name="P18" style:family="paragraph" style:parent-style-name="Standard">
      <style:paragraph-properties fo:margin-top="0.494cm" fo:margin-bottom="0.494cm" style:contextual-spacing="false" fo:line-height="100%" fo:text-align="start" style:justify-single-word="false"/>
      <style:text-properties officeooo:rsid="002d4f5c" officeooo:paragraph-rsid="002d4f5c"/>
    </style:style>
    <style:style style:name="P19" style:family="paragraph" style:parent-style-name="Standard">
      <style:paragraph-properties fo:margin-top="0.192cm" fo:margin-bottom="0.192cm" style:contextual-spacing="false" fo:line-height="100%" fo:text-align="start" style:justify-single-word="false"/>
      <style:text-properties officeooo:rsid="003e3e13" officeooo:paragraph-rsid="003e3e13"/>
    </style:style>
    <style:style style:name="P20" style:family="paragraph" style:parent-style-name="Standard" style:list-style-name="L1">
      <style:text-properties officeooo:paragraph-rsid="003e3e13"/>
    </style:style>
    <style:style style:name="P21" style:family="paragraph" style:parent-style-name="Standard" style:list-style-name="L1">
      <style:text-properties officeooo:paragraph-rsid="003f9e69"/>
    </style:style>
    <style:style style:name="P22" style:family="paragraph" style:parent-style-name="Standard" style:list-style-name="L1">
      <style:text-properties officeooo:paragraph-rsid="004159cb"/>
    </style:style>
    <style:style style:name="P23" style:family="paragraph" style:parent-style-name="Standard" style:list-style-name="L1">
      <style:text-properties officeooo:paragraph-rsid="004346bd"/>
    </style:style>
    <style:style style:name="P24" style:family="paragraph" style:parent-style-name="Standard" style:list-style-name="L1">
      <style:text-properties officeooo:paragraph-rsid="00458dce"/>
    </style:style>
    <style:style style:name="P25" style:family="paragraph" style:parent-style-name="Standard" style:list-style-name="L1">
      <style:text-properties officeooo:paragraph-rsid="0048967a"/>
    </style:style>
    <style:style style:name="P26" style:family="paragraph" style:parent-style-name="Standard">
      <style:paragraph-properties fo:text-align="center" style:justify-single-word="false"/>
      <style:text-properties officeooo:paragraph-rsid="003f9e69"/>
    </style:style>
    <style:style style:name="P27" style:family="paragraph" style:parent-style-name="Standard">
      <style:paragraph-properties fo:text-align="center" style:justify-single-word="false"/>
      <style:text-properties officeooo:paragraph-rsid="004159cb"/>
    </style:style>
    <style:style style:name="P28" style:family="paragraph" style:parent-style-name="Standard">
      <style:paragraph-properties fo:text-align="start" style:justify-single-word="false"/>
      <style:text-properties officeooo:paragraph-rsid="00458dce"/>
    </style:style>
    <style:style style:name="P29" style:family="paragraph" style:parent-style-name="Standard">
      <style:paragraph-properties fo:text-align="start" style:justify-single-word="false"/>
      <style:text-properties officeooo:paragraph-rsid="0048967a"/>
    </style:style>
    <style:style style:name="P30" style:family="paragraph" style:parent-style-name="Text_20_body" style:list-style-name="L1"/>
    <style:style style:name="P31" style:family="paragraph" style:parent-style-name="Text_20_body" style:list-style-name="L1">
      <style:text-properties style:font-name="Arial1"/>
    </style:style>
    <style:style style:name="P32" style:family="paragraph" style:parent-style-name="Text_20_body">
      <style:text-properties style:font-name="Arial1"/>
    </style:style>
    <style:style style:name="P33" style:family="paragraph" style:parent-style-name="Text_20_body" style:list-style-name="L2">
      <style:text-properties style:font-name="Arial1"/>
    </style:style>
    <style:style style:name="P34" style:family="paragraph" style:parent-style-name="Text_20_body">
      <style:paragraph-properties fo:text-align="center" style:justify-single-word="false"/>
      <style:text-properties style:font-name="Arial1" officeooo:paragraph-rsid="003e3e13"/>
    </style:style>
    <style:style style:name="P35" style:family="paragraph" style:parent-style-name="Text_20_body">
      <style:text-properties style:font-name="Arial1" officeooo:paragraph-rsid="003f9e69"/>
    </style:style>
    <style:style style:name="P36" style:family="paragraph" style:parent-style-name="Text_20_body" style:list-style-name="L3">
      <style:text-properties style:font-name="Arial1"/>
    </style:style>
    <style:style style:name="P37" style:family="paragraph" style:parent-style-name="Text_20_body">
      <style:text-properties style:font-name="Arial1" fo:font-weight="normal" officeooo:paragraph-rsid="003f9e69" style:font-weight-asian="normal" style:font-weight-complex="normal"/>
    </style:style>
    <style:style style:name="P38" style:family="paragraph" style:parent-style-name="Text_20_body">
      <style:text-properties style:font-name="Arial1" fo:font-weight="normal" officeooo:paragraph-rsid="004159cb" style:font-weight-asian="normal" style:font-weight-complex="normal"/>
    </style:style>
    <style:style style:name="P39" style:family="paragraph" style:parent-style-name="Text_20_body" style:list-style-name="L4">
      <style:text-properties style:font-name="Arial1"/>
    </style:style>
    <style:style style:name="P40" style:family="paragraph" style:parent-style-name="Text_20_body">
      <style:paragraph-properties fo:text-align="start" style:justify-single-word="false"/>
      <style:text-properties style:font-name="Arial1" officeooo:paragraph-rsid="003e3e13"/>
    </style:style>
    <style:style style:name="P41" style:family="paragraph" style:parent-style-name="Text_20_body">
      <style:paragraph-properties fo:text-align="start" style:justify-single-word="false"/>
      <style:text-properties style:font-name="Arial1" officeooo:paragraph-rsid="001937df"/>
    </style:style>
    <style:style style:name="P42" style:family="paragraph" style:parent-style-name="Text_20_body">
      <style:paragraph-properties fo:text-align="start" style:justify-single-word="false"/>
      <style:text-properties style:font-name="Arial1" officeooo:paragraph-rsid="0048967a"/>
    </style:style>
    <style:style style:name="P43"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Arial1"/>
    </style:style>
    <style:style style:name="P44" style:family="paragraph" style:parent-style-name="Text_20_body">
      <style:paragraph-properties fo:margin-left="0cm" fo:margin-right="0cm" fo:margin-top="0cm" fo:margin-bottom="0.247cm" style:contextual-spacing="false" fo:line-height="114%" fo:text-indent="0cm" style:auto-text-indent="false"/>
      <style:text-properties style:font-name="Arial1"/>
    </style:style>
    <style:style style:name="P45" style:family="paragraph" style:parent-style-name="Text_20_body">
      <style:paragraph-properties fo:text-align="start" style:justify-single-word="false"/>
      <style:text-properties style:font-name="Arial1" fo:font-size="14pt" fo:font-weight="normal" officeooo:paragraph-rsid="001937df"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style:font-name="Arial1" fo:font-size="12pt" fo:font-style="normal" fo:font-weight="bold" officeooo:rsid="003e3e13" officeooo:paragraph-rsid="00458dce" style:font-size-asian="12pt" style:font-style-asian="normal" style:font-weight-asian="bold" style:font-size-complex="12pt" style:font-style-complex="normal" style:font-weight-complex="bold"/>
    </style:style>
    <style:style style:name="P47" style:family="paragraph" style:parent-style-name="Text_20_body">
      <style:paragraph-properties fo:text-align="start" style:justify-single-word="false"/>
      <style:text-properties style:font-name="Arial1" fo:font-size="12pt" fo:font-style="normal" fo:font-weight="bold" officeooo:rsid="003e3e13" officeooo:paragraph-rsid="0048967a" style:font-size-asian="12pt" style:font-style-asian="normal" style:font-weight-asian="bold" style:font-size-complex="12pt" style:font-style-complex="normal" style:font-weight-complex="bold"/>
    </style:style>
    <style:style style:name="P48" style:family="paragraph" style:parent-style-name="Text_20_body">
      <style:paragraph-properties fo:text-align="start" style:justify-single-word="false"/>
      <style:text-properties style:font-name="Arial1" fo:font-size="13pt" fo:font-style="normal" fo:font-weight="normal" officeooo:rsid="003e3e13" officeooo:paragraph-rsid="00458dce" style:font-size-asian="13pt" style:font-style-asian="normal" style:font-weight-asian="normal" style:font-size-complex="13pt" style:font-style-complex="normal" style:font-weight-complex="normal"/>
    </style:style>
    <style:style style:name="P49" style:family="paragraph" style:parent-style-name="Text_20_body">
      <style:paragraph-properties fo:text-align="start" style:justify-single-word="false"/>
      <style:text-properties style:font-name="Arial1" fo:font-size="13pt" fo:font-style="normal" fo:font-weight="normal" officeooo:rsid="003e3e13" officeooo:paragraph-rsid="0048967a" style:font-size-asian="13pt" style:font-style-asian="normal" style:font-weight-asian="normal" style:font-size-complex="13pt" style:font-style-complex="normal" style:font-weight-complex="normal"/>
    </style:style>
    <style:style style:name="P50" style:family="paragraph" style:parent-style-name="Text_20_body" style:list-style-name="L9">
      <style:text-properties style:font-name="Arial1"/>
    </style:style>
    <style:style style:name="P51" style:family="paragraph" style:parent-style-name="Text_20_body">
      <style:paragraph-properties fo:text-align="center" style:justify-single-word="false"/>
      <style:text-properties officeooo:paragraph-rsid="003c56f3"/>
    </style:style>
    <style:style style:name="P52" style:family="paragraph" style:parent-style-name="Text_20_body">
      <style:paragraph-properties fo:text-align="center" style:justify-single-word="false"/>
      <style:text-properties officeooo:paragraph-rsid="003da15a"/>
    </style:style>
    <style:style style:name="P53" style:family="paragraph" style:parent-style-name="Text_20_body">
      <style:paragraph-properties fo:text-align="center" style:justify-single-word="false"/>
      <style:text-properties officeooo:paragraph-rsid="003e3e13"/>
    </style:style>
    <style:style style:name="P54" style:family="paragraph" style:parent-style-name="Text_20_body">
      <style:paragraph-properties fo:text-align="center" style:justify-single-word="false"/>
      <style:text-properties officeooo:paragraph-rsid="003f82bc"/>
    </style:style>
    <style:style style:name="P55" style:family="paragraph" style:parent-style-name="Text_20_body">
      <style:paragraph-properties fo:text-align="center" style:justify-single-word="false"/>
      <style:text-properties officeooo:paragraph-rsid="003f9e69"/>
    </style:style>
    <style:style style:name="P56" style:family="paragraph" style:parent-style-name="Text_20_body">
      <style:paragraph-properties fo:text-align="center" style:justify-single-word="false"/>
      <style:text-properties officeooo:paragraph-rsid="004159cb"/>
    </style:style>
    <style:style style:name="P57" style:family="paragraph" style:parent-style-name="Text_20_body">
      <style:paragraph-properties fo:text-align="center" style:justify-single-word="false"/>
      <style:text-properties officeooo:paragraph-rsid="004346bd"/>
    </style:style>
    <style:style style:name="P58" style:family="paragraph" style:parent-style-name="Text_20_body">
      <style:paragraph-properties fo:text-align="start" style:justify-single-word="false"/>
      <style:text-properties officeooo:paragraph-rsid="003f9e69"/>
    </style:style>
    <style:style style:name="P59" style:family="paragraph" style:parent-style-name="Text_20_body">
      <style:paragraph-properties fo:text-align="start" style:justify-single-word="false"/>
      <style:text-properties officeooo:paragraph-rsid="003e3e13"/>
    </style:style>
    <style:style style:name="P60" style:family="paragraph" style:parent-style-name="Text_20_body">
      <style:paragraph-properties fo:text-align="start" style:justify-single-word="false"/>
      <style:text-properties officeooo:paragraph-rsid="004159cb"/>
    </style:style>
    <style:style style:name="P61" style:family="paragraph" style:parent-style-name="Text_20_body">
      <style:paragraph-properties fo:text-align="start" style:justify-single-word="false"/>
      <style:text-properties officeooo:paragraph-rsid="001937df"/>
    </style:style>
    <style:style style:name="P62" style:family="paragraph" style:parent-style-name="Text_20_body">
      <style:paragraph-properties fo:text-align="start" style:justify-single-word="false"/>
      <style:text-properties officeooo:paragraph-rsid="004346bd"/>
    </style:style>
    <style:style style:name="P63" style:family="paragraph" style:parent-style-name="Text_20_body">
      <style:paragraph-properties fo:text-align="start" style:justify-single-word="false"/>
      <style:text-properties officeooo:paragraph-rsid="00458dce"/>
    </style:style>
    <style:style style:name="P64" style:family="paragraph" style:parent-style-name="Text_20_body">
      <style:paragraph-properties fo:text-align="start" style:justify-single-word="false"/>
      <style:text-properties officeooo:paragraph-rsid="0048967a"/>
    </style:style>
    <style:style style:name="P65" style:family="paragraph" style:parent-style-name="Text_20_body">
      <style:paragraph-properties fo:text-align="start" style:justify-single-word="false"/>
      <style:text-properties officeooo:paragraph-rsid="004a251f"/>
    </style:style>
    <style:style style:name="P66" style:family="paragraph" style:parent-style-name="Text_20_body" style:list-style-name="L2"/>
    <style:style style:name="P67" style:family="paragraph" style:parent-style-name="Text_20_body" style:list-style-name="L4"/>
    <style:style style:name="P68" style:family="paragraph" style:parent-style-name="Text_20_body">
      <style:paragraph-properties fo:text-align="start" style:justify-single-word="false"/>
      <style:text-properties fo:font-size="12pt" fo:font-weight="normal" officeooo:rsid="003e3e13" officeooo:paragraph-rsid="004159cb"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normal" officeooo:rsid="003e3e13" officeooo:paragraph-rsid="004346bd"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003e3e13" officeooo:paragraph-rsid="00458dce"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normal" officeooo:rsid="003e3e13" officeooo:paragraph-rsid="0048967a" style:font-size-asian="12pt" style:font-weight-asian="normal" style:font-size-complex="12pt" style:font-weight-complex="normal"/>
    </style:style>
    <style:style style:name="P7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7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74" style:family="paragraph" style:parent-style-name="Text_20_body">
      <style:paragraph-properties fo:text-align="start" style:justify-single-word="false"/>
      <style:text-properties fo:font-size="18pt" officeooo:paragraph-rsid="001937df" style:font-size-asian="18pt" style:font-size-complex="18pt"/>
    </style:style>
    <style:style style:name="P75" style:family="paragraph" style:parent-style-name="Text_20_body">
      <style:paragraph-properties fo:text-align="start" style:justify-single-word="false"/>
      <style:text-properties officeooo:rsid="004346bd" officeooo:paragraph-rsid="004346bd"/>
    </style:style>
    <style:style style:name="P76" style:family="paragraph" style:parent-style-name="Text_20_body">
      <style:paragraph-properties fo:text-align="start" style:justify-single-word="false"/>
      <style:text-properties officeooo:rsid="00445b74" officeooo:paragraph-rsid="00445b74"/>
    </style:style>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9">
      <style:text-properties officeooo:paragraph-rsid="0048967a"/>
    </style:style>
    <style:style style:name="P81" style:family="paragraph" style:parent-style-name="Text_20_body">
      <style:paragraph-properties fo:text-align="start" style:justify-single-word="false"/>
      <style:text-properties fo:font-size="13pt" fo:font-weight="normal" officeooo:paragraph-rsid="001937df" style:font-size-asian="13pt" style:font-weight-asian="normal" style:font-size-complex="13pt" style:font-weight-complex="normal"/>
    </style:style>
    <style:style style:name="P82" style:family="paragraph" style:parent-style-name="Text_20_body">
      <style:paragraph-properties fo:text-align="start" style:justify-single-word="false"/>
      <style:text-properties fo:font-size="13pt" fo:font-weight="normal" officeooo:paragraph-rsid="004a251f" style:font-size-asian="13pt" style:font-weight-asian="normal" style:font-size-complex="13pt" style:font-weight-complex="normal"/>
    </style:style>
    <style:style style:name="P83" style:family="paragraph" style:parent-style-name="Text_20_body">
      <style:text-properties officeooo:paragraph-rsid="0048967a"/>
    </style:style>
    <style:style style:name="P84" style:family="paragraph" style:parent-style-name="Text_20_body" style:list-style-name="L10"/>
    <style:style style:name="P85"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86"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87"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88" style:family="paragraph" style:parent-style-name="normal">
      <style:paragraph-properties fo:margin-top="0.494cm" fo:margin-bottom="0.494cm" style:contextual-spacing="false" fo:line-height="100%" fo:text-align="center" style:justify-single-word="false"/>
      <style:text-properties officeooo:paragraph-rsid="003f82bc"/>
    </style:style>
    <style:style style:name="P89" style:family="paragraph" style:parent-style-name="normal">
      <style:paragraph-properties fo:margin-top="0.494cm" fo:margin-bottom="0.494cm" style:contextual-spacing="false" fo:line-height="100%" fo:text-align="start" style:justify-single-word="false"/>
      <style:text-properties officeooo:paragraph-rsid="002e3c92"/>
    </style:style>
    <style:style style:name="P90" style:family="paragraph" style:parent-style-name="normal">
      <style:paragraph-properties fo:margin-top="0.192cm" fo:margin-bottom="0.192cm" style:contextual-spacing="false" fo:line-height="100%" fo:text-align="start" style:justify-single-word="false"/>
      <style:text-properties officeooo:paragraph-rsid="00385828"/>
    </style:style>
    <style:style style:name="P91" style:family="paragraph" style:parent-style-name="normal">
      <style:paragraph-properties fo:margin-top="0.494cm" fo:margin-bottom="0.494cm" style:contextual-spacing="false" fo:line-height="100%" fo:text-align="start" style:justify-single-word="false"/>
      <style:text-properties officeooo:paragraph-rsid="0032f1c5"/>
    </style:style>
    <style:style style:name="P92" style:family="paragraph" style:parent-style-name="normal">
      <style:paragraph-properties fo:margin-top="0.494cm" fo:margin-bottom="0.494cm" style:contextual-spacing="false" fo:line-height="100%" fo:text-align="start" style:justify-single-word="false"/>
      <style:text-properties officeooo:paragraph-rsid="003ade13"/>
    </style:style>
    <style:style style:name="P93" style:family="paragraph" style:parent-style-name="normal">
      <style:paragraph-properties fo:margin-top="0.092cm" fo:margin-bottom="0.092cm" style:contextual-spacing="false" fo:line-height="100%" fo:text-align="start" style:justify-single-word="false"/>
      <style:text-properties officeooo:paragraph-rsid="001937df"/>
    </style:style>
    <style:style style:name="P94" style:family="paragraph" style:parent-style-name="normal">
      <style:paragraph-properties fo:margin-top="0.494cm" fo:margin-bottom="0.494cm" style:contextual-spacing="false" fo:line-height="100%" fo:text-align="start" style:justify-single-word="false"/>
      <style:text-properties officeooo:paragraph-rsid="003da15a"/>
    </style:style>
    <style:style style:name="P95" style:family="paragraph" style:parent-style-name="normal">
      <style:paragraph-properties fo:margin-top="0.494cm" fo:margin-bottom="0.494cm" style:contextual-spacing="false" fo:line-height="100%" fo:text-align="start" style:justify-single-word="false"/>
      <style:text-properties officeooo:paragraph-rsid="003e3e13"/>
    </style:style>
    <style:style style:name="P96" style:family="paragraph" style:parent-style-name="normal">
      <style:paragraph-properties fo:margin-top="0.494cm" fo:margin-bottom="0.494cm" style:contextual-spacing="false" fo:line-height="100%" fo:text-align="start" style:justify-single-word="false"/>
      <style:text-properties officeooo:paragraph-rsid="003f9e69"/>
    </style:style>
    <style:style style:name="P97" style:family="paragraph" style:parent-style-name="normal">
      <style:paragraph-properties fo:margin-top="0.494cm" fo:margin-bottom="0.494cm" style:contextual-spacing="false" fo:line-height="100%" fo:text-align="start" style:justify-single-word="false"/>
      <style:text-properties officeooo:paragraph-rsid="004159cb"/>
    </style:style>
    <style:style style:name="P98" style:family="paragraph" style:parent-style-name="normal">
      <style:paragraph-properties fo:margin-top="0.494cm" fo:margin-bottom="0.494cm" style:contextual-spacing="false" fo:line-height="100%" fo:text-align="start" style:justify-single-word="false"/>
      <style:text-properties officeooo:paragraph-rsid="004346bd"/>
    </style:style>
    <style:style style:name="P99" style:family="paragraph" style:parent-style-name="normal">
      <style:paragraph-properties fo:margin-top="0.494cm" fo:margin-bottom="0.494cm" style:contextual-spacing="false" fo:line-height="100%" fo:text-align="start" style:justify-single-word="false"/>
      <style:text-properties officeooo:paragraph-rsid="00458dce"/>
    </style:style>
    <style:style style:name="P100" style:family="paragraph" style:parent-style-name="normal">
      <style:paragraph-properties fo:margin-top="0.494cm" fo:margin-bottom="0.494cm" style:contextual-spacing="false" fo:line-height="100%" fo:text-align="start" style:justify-single-word="false"/>
      <style:text-properties officeooo:paragraph-rsid="0048967a"/>
    </style:style>
    <style:style style:name="P101"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02"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85828" style:font-name-asian="Arial2" style:font-size-asian="22pt" style:font-weight-asian="normal" style:font-name-complex="Arial2" style:font-size-complex="22pt" style:font-weight-complex="normal"/>
    </style:style>
    <style:style style:name="P103"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3031bd" style:font-name-asian="Arial2" style:font-size-asian="22pt" style:font-weight-asian="normal" style:font-name-complex="Arial2" style:font-size-complex="22pt" style:font-weight-complex="normal"/>
    </style:style>
    <style:style style:name="P104"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105"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445b74" style:font-name-asian="Arial2" style:font-size-asian="22pt" style:font-weight-asian="normal" style:font-name-complex="Arial2" style:font-size-complex="22pt" style:font-weight-complex="normal"/>
    </style:style>
    <style:style style:name="P106" style:family="paragraph" style:parent-style-name="normal">
      <style:paragraph-properties fo:margin-top="0.494cm" fo:margin-bottom="0.494cm" style:contextual-spacing="false" fo:line-height="100%" fo:text-align="start" style:justify-single-word="false"/>
      <style:text-properties fo:font-weight="normal" officeooo:paragraph-rsid="003da15a" style:font-weight-asian="normal" style:font-weight-complex="normal"/>
    </style:style>
    <style:style style:name="P107" style:family="paragraph" style:parent-style-name="normal">
      <style:paragraph-properties fo:margin-top="0.092cm" fo:margin-bottom="0.092cm" style:contextual-spacing="false" fo:line-height="100%" fo:text-align="start" style:justify-single-word="false"/>
      <style:text-properties fo:font-weight="normal" officeooo:paragraph-rsid="003e3e13" style:font-weight-asian="normal" style:font-weight-complex="normal"/>
    </style:style>
    <style:style style:name="P108" style:family="paragraph" style:parent-style-name="normal">
      <style:paragraph-properties fo:margin-top="0.494cm" fo:margin-bottom="0.494cm" style:contextual-spacing="false" fo:line-height="100%" fo:text-align="start" style:justify-single-word="false"/>
      <style:text-properties fo:font-weight="normal" officeooo:paragraph-rsid="00458dce" style:font-weight-asian="normal" style:font-weight-complex="normal"/>
    </style:style>
    <style:style style:name="P109" style:family="paragraph" style:parent-style-name="normal">
      <style:paragraph-properties fo:margin-top="0.494cm" fo:margin-bottom="0.494cm" style:contextual-spacing="false" fo:line-height="100%" fo:text-align="start" style:justify-single-word="false"/>
      <style:text-properties fo:font-weight="normal" officeooo:paragraph-rsid="0048967a" style:font-weight-asian="normal" style:font-weight-complex="normal"/>
    </style:style>
    <style:style style:name="P110" style:family="paragraph" style:parent-style-name="normal">
      <style:paragraph-properties fo:margin-top="0.092cm" fo:margin-bottom="0.092cm" style:contextual-spacing="false" fo:line-height="100%" fo:text-align="start" style:justify-single-word="false"/>
      <style:text-properties officeooo:rsid="0032f1c5" officeooo:paragraph-rsid="0032f1c5"/>
    </style:style>
    <style:style style:name="P111" style:family="paragraph" style:parent-style-name="normal">
      <style:paragraph-properties fo:margin-top="0.092cm" fo:margin-bottom="0.092cm" style:contextual-spacing="false" fo:line-height="100%" fo:text-align="start" style:justify-single-word="false"/>
      <style:text-properties officeooo:rsid="0032f1c5" officeooo:paragraph-rsid="003e3e13"/>
    </style:style>
    <style:style style:name="P112"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113" style:family="paragraph" style:parent-style-name="normal">
      <style:paragraph-properties fo:margin-top="0.494cm" fo:margin-bottom="0.494cm" style:contextual-spacing="false" fo:line-height="100%" fo:text-align="start" style:justify-single-word="false"/>
      <style:text-properties fo:font-weight="bold" officeooo:paragraph-rsid="00458dce" style:font-weight-asian="bold" style:font-weight-complex="bold"/>
    </style:style>
    <style:style style:name="P114" style:family="paragraph" style:parent-style-name="normal">
      <style:paragraph-properties fo:margin-top="0.494cm" fo:margin-bottom="0.494cm" style:contextual-spacing="false" fo:line-height="100%" fo:text-align="start" style:justify-single-word="false"/>
      <style:text-properties fo:font-weight="bold" officeooo:paragraph-rsid="0048967a" style:font-weight-asian="bold" style:font-weight-complex="bold"/>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7" style:family="text">
      <style:text-properties style:font-name="Arial" fo:font-size="22pt" fo:font-weight="bold" officeooo:rsid="00458dce" style:font-name-asian="Arial2" style:font-size-asian="22pt" style:font-weight-asian="bold" style:font-name-complex="Arial2" style:font-size-complex="22pt" style:font-weight-complex="bold"/>
    </style:style>
    <style:style style:name="T8" style:family="text">
      <style:text-properties style:font-name="Arial" fo:font-size="22pt" fo:font-weight="bold" officeooo:rsid="003031bd" style:font-name-asian="Arial2" style:font-size-asian="22pt" style:font-weight-asian="bold" style:font-name-complex="Arial2" style:font-size-complex="22pt"/>
    </style:style>
    <style:style style:name="T9" style:family="text">
      <style:text-properties style:font-name="Arial" fo:font-size="22pt" fo:font-weight="bold" officeooo:rsid="0032f1c5" style:font-name-asian="Arial2" style:font-size-asian="22pt" style:font-weight-asian="bold" style:font-name-complex="Arial2" style:font-size-complex="22pt"/>
    </style:style>
    <style:style style:name="T10" style:family="text">
      <style:text-properties style:font-name="Arial" fo:font-size="22pt" fo:font-weight="bold" officeooo:rsid="003ade13" style:font-name-asian="Arial2" style:font-size-asian="22pt" style:font-weight-asian="bold" style:font-name-complex="Arial2" style:font-size-complex="22pt"/>
    </style:style>
    <style:style style:name="T11" style:family="text">
      <style:text-properties style:font-name="Arial" fo:font-size="22pt" style:font-name-asian="Arial2" style:font-size-asian="22pt" style:font-name-complex="Arial2" style:font-size-complex="22pt"/>
    </style:style>
    <style:style style:name="T12" style:family="text">
      <style:text-properties style:font-name="Arial" fo:font-size="22pt" officeooo:rsid="00125de4" style:font-name-asian="Arial2" style:font-size-asian="22pt" style:font-name-complex="Arial2" style:font-size-complex="22pt"/>
    </style:style>
    <style:style style:name="T13" style:family="text">
      <style:text-properties style:font-name="Arial" fo:font-size="22pt" officeooo:rsid="001260f3" style:font-name-asian="Arial2" style:font-size-asian="22pt" style:font-name-complex="Arial2" style:font-size-complex="22pt"/>
    </style:style>
    <style:style style:name="T14" style:family="text">
      <style:text-properties style:font-name="Arial" fo:font-size="22pt" officeooo:rsid="001260f3" style:font-name-asian="Arial2" style:font-size-asian="22pt" style:font-weight-asian="bold" style:font-name-complex="Arial2" style:font-size-complex="22pt" style:font-weight-complex="bold"/>
    </style:style>
    <style:style style:name="T15"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6" style:family="text">
      <style:text-properties style:font-name="Arial" fo:font-size="22pt" fo:font-style="italic" fo:font-weight="bold" officeooo:rsid="003c56f3" style:font-name-asian="Arial2" style:font-size-asian="22pt" style:font-style-asian="italic" style:font-weight-asian="bold" style:font-name-complex="Arial2" style:font-size-complex="22pt" style:font-style-complex="italic" style:font-weight-complex="bold"/>
    </style:style>
    <style:style style:name="T17" style:family="text">
      <style:text-properties style:font-name="Arial" fo:font-size="15pt" officeooo:rsid="001260f3" style:font-name-asian="Arial2" style:font-size-asian="15pt" style:font-name-complex="Arial2" style:font-size-complex="15pt"/>
    </style:style>
    <style:style style:name="T18" style:family="text">
      <style:text-properties style:font-name="Arial" fo:font-size="15pt" officeooo:rsid="001937df" style:font-name-asian="Arial2" style:font-size-asian="15pt" style:font-name-complex="Arial2" style:font-size-complex="15pt"/>
    </style:style>
    <style:style style:name="T19"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20"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21" style:family="text">
      <style:text-properties style:font-name="Arial" fo:font-size="15pt" fo:font-style="italic" fo:font-weight="bold" officeooo:rsid="003e3e13" style:font-name-asian="Arial2" style:font-size-asian="15pt" style:font-style-asian="italic" style:font-weight-asian="bold" style:font-name-complex="Arial2" style:font-size-complex="15pt" style:font-style-complex="italic" style:font-weight-complex="bold"/>
    </style:style>
    <style:style style:name="T22" style:family="text">
      <style:text-properties style:font-name="Arial"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23"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24" style:family="text">
      <style:text-properties style:font-name="Arial" fo:font-size="15pt" fo:font-weight="bold" officeooo:rsid="003ade13" style:font-name-asian="Arial2" style:font-size-asian="15pt" style:font-weight-asian="bold" style:font-name-complex="Arial2" style:font-size-complex="15pt" style:font-weight-complex="bold"/>
    </style:style>
    <style:style style:name="T25" style:family="text">
      <style:text-properties style:font-name="Arial" fo:font-size="15pt" fo:font-weight="bold" officeooo:rsid="003e3e13" style:font-name-asian="Arial2" style:font-size-asian="15pt" style:font-weight-asian="bold" style:font-name-complex="Arial2" style:font-size-complex="15pt" style:font-weight-complex="bold"/>
    </style:style>
    <style:style style:name="T26"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7" style:family="text">
      <style:text-properties style:font-name="Arial" fo:font-size="15pt" fo:font-weight="normal" officeooo:rsid="003ade13" style:font-name-asian="Arial2" style:font-size-asian="15pt" style:font-weight-asian="normal" style:font-name-complex="Arial2" style:font-size-complex="15pt" style:font-weight-complex="normal"/>
    </style:style>
    <style:style style:name="T28" style:family="text">
      <style:text-properties style:font-name="Arial" fo:font-size="14pt" officeooo:rsid="001260f3" style:font-name-asian="Arial2" style:font-size-asian="14pt" style:font-name-complex="Arial2" style:font-size-complex="14pt"/>
    </style:style>
    <style:style style:name="T29"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30"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31" style:family="text">
      <style:text-properties style:font-name="Arial" fo:font-size="13pt" fo:font-style="italic" fo:font-weight="normal" officeooo:rsid="003da15a" style:font-name-asian="Arial2" style:font-size-asian="13pt" style:font-style-asian="italic" style:font-weight-asian="normal" style:font-name-complex="Arial2" style:font-size-complex="13pt" style:font-style-complex="italic" style:font-weight-complex="normal"/>
    </style:style>
    <style:style style:name="T32" style:family="text">
      <style:text-properties style:font-name="Arial" fo:font-size="13pt" fo:font-weight="normal" officeooo:rsid="001260f3" style:font-name-asian="Arial2" style:font-size-asian="13pt" style:font-weight-asian="normal" style:font-name-complex="Arial2" style:font-size-complex="13pt" style:font-weight-complex="normal"/>
    </style:style>
    <style:style style:name="T33" style:family="text">
      <style:text-properties style:font-name="Arial" fo:font-weight="bold" officeooo:rsid="001260f3" style:font-name-asian="Arial2" style:font-weight-asian="bold" style:font-name-complex="Arial2" style:font-weight-complex="bold"/>
    </style:style>
    <style:style style:name="T34" style:family="text">
      <style:text-properties style:font-name="Arial" officeooo:rsid="001260f3" style:font-name-asian="Arial2" style:font-name-complex="Arial2"/>
    </style:style>
    <style:style style:name="T35" style:family="text">
      <style:text-properties fo:font-size="15pt" style:font-size-asian="15pt" style:font-size-complex="15pt"/>
    </style:style>
    <style:style style:name="T36" style:family="text">
      <style:text-properties fo:font-size="15pt" officeooo:rsid="0013bbfd" style:font-size-asian="15pt" style:font-size-complex="15pt"/>
    </style:style>
    <style:style style:name="T37" style:family="text">
      <style:text-properties fo:font-size="15pt" officeooo:rsid="00160399" style:font-size-asian="15pt" style:font-size-complex="15pt"/>
    </style:style>
    <style:style style:name="T38" style:family="text">
      <style:text-properties fo:font-size="15pt" fo:font-weight="bold" style:font-size-asian="15pt" style:font-weight-asian="bold" style:font-size-complex="15pt" style:font-weight-complex="bold"/>
    </style:style>
    <style:style style:name="T39" style:family="text">
      <style:text-properties fo:font-size="15pt" fo:font-weight="bold" officeooo:rsid="0013bbfd" style:font-size-asian="15pt" style:font-weight-asian="bold" style:font-size-complex="15pt" style:font-weight-complex="bold"/>
    </style:style>
    <style:style style:name="T40"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font-style="normal" officeooo:rsid="00250bdc" style:font-name-asian="Arial2" style:font-size-asian="12pt" style:font-style-asian="normal" style:font-name-complex="Arial2" style:font-size-complex="12pt" style:font-style-complex="normal"/>
    </style:style>
    <style:style style:name="T45" style:family="text">
      <style:text-properties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46" style:family="text">
      <style:text-properties fo:font-size="12pt" fo:font-style="italic" officeooo:rsid="00250bdc" style:font-name-asian="Arial2" style:font-size-asian="12pt" style:font-style-asian="italic" style:font-name-complex="Arial2" style:font-size-complex="12pt" style:font-style-complex="italic"/>
    </style:style>
    <style:style style:name="T47" style:family="text">
      <style:text-properties fo:font-size="12pt" fo:font-style="italic" officeooo:rsid="00250bdc" style:font-size-asian="12pt" style:font-style-asian="italic" style:font-size-complex="12pt" style:font-style-complex="italic"/>
    </style:style>
    <style:style style:name="T48" style:family="text">
      <style:text-properties style:font-name="Arial1" fo:font-size="15pt" officeooo:rsid="001260f3" style:font-name-asian="Arial2" style:font-size-asian="15pt" style:font-name-complex="Arial2" style:font-size-complex="15pt"/>
    </style:style>
    <style:style style:name="T49"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50"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51" style:family="text">
      <style:text-properties style:font-name="Liberation Serif" fo:font-size="15pt" fo:font-style="italic" fo:font-weight="bold" officeooo:rsid="0032f1c5" style:font-name-asian="Arial2" style:font-size-asian="15pt" style:font-style-asian="italic" style:font-weight-asian="bold" style:font-name-complex="Arial2" style:font-size-complex="15pt" style:font-style-complex="italic" style:font-weight-complex="bold"/>
    </style:style>
    <style:style style:name="T52" style:family="text">
      <style:text-properties style:font-name="Liberation Serif" fo:font-size="15pt" fo:font-style="italic" fo:font-weight="bold" officeooo:rsid="003c56f3" style:font-name-asian="Arial2" style:font-size-asian="15pt" style:font-style-asian="italic" style:font-weight-asian="bold" style:font-name-complex="Arial2" style:font-size-complex="15pt" style:font-style-complex="italic" style:font-weight-complex="bold"/>
    </style:style>
    <style:style style:name="T53" style:family="text">
      <style:text-properties style:font-name="Liberation Serif" fo:font-size="15pt" fo:font-style="italic" fo:font-weight="bold" officeooo:rsid="003e3e13" style:font-name-asian="Arial2" style:font-size-asian="15pt" style:font-style-asian="italic" style:font-weight-asian="bold" style:font-name-complex="Arial2" style:font-size-complex="15pt" style:font-style-complex="italic" style:font-weight-complex="bold"/>
    </style:style>
    <style:style style:name="T54" style:family="text">
      <style:text-properties style:font-name="Liberation Serif"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55" style:family="text">
      <style:text-properties style:font-name="Liberation Serif" fo:font-size="15pt" fo:font-style="italic" fo:font-weight="bold" officeooo:rsid="004159cb" style:font-name-asian="Arial2" style:font-size-asian="15pt" style:font-style-asian="italic" style:font-weight-asian="bold" style:font-name-complex="Arial2" style:font-size-complex="15pt" style:font-style-complex="italic" style:font-weight-complex="bold"/>
    </style:style>
    <style:style style:name="T56" style:family="text">
      <style:text-properties style:font-name="Liberation Serif" fo:font-size="15pt" fo:font-style="italic" fo:font-weight="bold" officeooo:rsid="004346bd" style:font-name-asian="Arial2" style:font-size-asian="15pt" style:font-style-asian="italic" style:font-weight-asian="bold" style:font-name-complex="Arial2" style:font-size-complex="15pt" style:font-style-complex="italic" style:font-weight-complex="bold"/>
    </style:style>
    <style:style style:name="T57" style:family="text">
      <style:text-properties style:font-name="Liberation Serif" fo:font-size="15pt" fo:font-style="italic" fo:font-weight="bold" officeooo:rsid="00458dce" style:font-name-asian="Arial2" style:font-size-asian="15pt" style:font-style-asian="italic" style:font-weight-asian="bold" style:font-name-complex="Arial2" style:font-size-complex="15pt" style:font-style-complex="italic" style:font-weight-complex="bold"/>
    </style:style>
    <style:style style:name="T58" style:family="text">
      <style:text-properties style:font-name="Liberation Serif" fo:font-size="15pt" fo:font-style="italic" fo:font-weight="bold" officeooo:rsid="0048967a" style:font-name-asian="Arial2" style:font-size-asian="15pt" style:font-style-asian="italic" style:font-weight-asian="bold" style:font-name-complex="Arial2" style:font-size-complex="15pt" style:font-style-complex="italic" style:font-weight-complex="bold"/>
    </style:style>
    <style:style style:name="T59" style:family="text">
      <style:text-properties style:font-name="Liberation Serif" fo:font-style="italic" officeooo:rsid="001260f3" style:font-name-asian="Arial2" style:font-style-asian="italic" style:font-name-complex="Arial2" style:font-style-complex="italic"/>
    </style:style>
    <style:style style:name="T60" style:family="text">
      <style:text-properties style:font-name="Liberation Serif" fo:font-style="italic" officeooo:rsid="003c56f3" style:font-name-asian="Arial2" style:font-style-asian="italic" style:font-name-complex="Arial2" style:font-style-complex="italic"/>
    </style:style>
    <style:style style:name="T61" style:family="text">
      <style:text-properties style:font-name="Liberation Serif"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62" style:family="text">
      <style:text-properties style:font-name="Liberation Serif" fo:font-size="12pt" fo:font-style="italic" fo:font-weight="bold" officeooo:rsid="003c56f3" style:font-name-asian="Arial2" style:font-size-asian="12pt" style:font-style-asian="italic" style:font-weight-asian="bold" style:font-name-complex="Arial2" style:font-size-complex="12pt" style:font-style-complex="italic" style:font-weight-complex="bold"/>
    </style:style>
    <style:style style:name="T63" style:family="text">
      <style:text-properties style:font-name="Liberation Serif" fo:font-size="12pt" fo:font-style="italic" fo:font-weight="normal" officeooo:rsid="001260f3" style:font-name-asian="Arial2" style:font-size-asian="12pt" style:font-style-asian="italic" style:font-weight-asian="normal" style:font-name-complex="Arial2" style:font-size-complex="12pt" style:font-style-complex="italic" style:font-weight-complex="normal"/>
    </style:style>
    <style:style style:name="T64" style:family="text">
      <style:text-properties style:font-name="Liberation Serif" fo:font-size="12pt" fo:font-style="italic" fo:font-weight="normal" officeooo:rsid="00250bdc" style:font-name-asian="Arial2" style:font-size-asian="12pt" style:font-style-asian="italic" style:font-weight-asian="normal" style:font-name-complex="Arial2" style:font-size-complex="12pt" style:font-style-complex="italic" style:font-weight-complex="normal"/>
    </style:style>
    <style:style style:name="T65" style:family="text">
      <style:text-properties style:font-name="Liberation Serif" fo:font-size="12pt" fo:font-style="italic" fo:font-weight="normal" officeooo:rsid="003e3e13" style:font-name-asian="Arial2" style:font-size-asian="12pt" style:font-style-asian="italic" style:font-weight-asian="normal" style:font-name-complex="Arial2" style:font-size-complex="12pt" style:font-style-complex="italic" style:font-weight-complex="normal"/>
    </style:style>
    <style:style style:name="T66"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T67" style:family="text">
      <style:text-properties style:font-name="Liberation Serif" fo:font-size="12pt" fo:font-style="normal" fo:font-weight="normal" officeooo:rsid="00250bdc" style:font-name-asian="Arial2" style:font-size-asian="12pt" style:font-style-asian="normal" style:font-weight-asian="normal" style:font-name-complex="Arial2" style:font-size-complex="12pt" style:font-style-complex="normal" style:font-weight-complex="normal"/>
    </style:style>
    <style:style style:name="T68" style:family="text">
      <style:text-properties fo:font-style="italic" officeooo:rsid="00250bdc" style:font-name-asian="Arial2" style:font-style-asian="italic" style:font-weight-asian="bold" style:font-name-complex="Arial2" style:font-style-complex="italic" style:font-weight-complex="bold"/>
    </style:style>
    <style:style style:name="T69" style:family="text">
      <style:text-properties fo:font-style="italic" fo:font-weight="bold" officeooo:rsid="00250bdc" style:font-name-asian="Arial2" style:font-style-asian="italic" style:font-weight-asian="bold" style:font-name-complex="Arial2" style:font-style-complex="italic" style:font-weight-complex="bold"/>
    </style:style>
    <style:style style:name="T70" style:family="text">
      <style:text-properties style:font-name="Arial1"/>
    </style:style>
    <style:style style:name="T71" style:family="text">
      <style:text-properties style:font-name="Arial1" fo:font-weight="bold"/>
    </style:style>
    <style:style style:name="T72" style:family="text">
      <style:text-properties style:font-name="Arial1" fo:font-weight="bold" officeooo:rsid="001260f3" style:font-weight-asian="bold" style:font-weight-complex="bold"/>
    </style:style>
    <style:style style:name="T73" style:family="text">
      <style:text-properties style:font-name="Arial1" fo:font-style="italic"/>
    </style:style>
    <style:style style:name="T74" style:family="text">
      <style:text-properties style:font-name="Arial1" fo:font-size="12pt" fo:font-style="italic" fo:font-weight="normal" officeooo:rsid="003da15a" style:font-name-asian="Arial2" style:font-size-asian="12pt" style:font-style-asian="italic" style:font-weight-asian="normal" style:font-name-complex="Arial2" style:font-size-complex="12pt" style:font-style-complex="italic" style:font-weight-complex="normal"/>
    </style:style>
    <style:style style:name="T75" style:family="text">
      <style:text-properties style:font-name="Arial1" fo:font-size="12pt" fo:font-style="italic" fo:font-weight="bold" officeooo:rsid="003da15a" style:font-name-asian="Arial2" style:font-size-asian="12pt" style:font-style-asian="italic" style:font-weight-asian="bold" style:font-name-complex="Arial2" style:font-size-complex="12pt" style:font-style-complex="italic" style:font-weight-complex="bold"/>
    </style:style>
    <style:style style:name="T76" style:family="text">
      <style:text-properties style:font-name="Arial1" fo:font-size="12pt" fo:font-style="italic" fo:font-weight="bold" officeooo:rsid="00250bdc" style:font-name-asian="Arial2" style:font-size-asian="12pt" style:font-style-asian="italic" style:font-weight-asian="bold" style:font-name-complex="Arial2" style:font-size-complex="12pt" style:font-style-complex="italic" style:font-weight-complex="bold"/>
    </style:style>
    <style:style style:name="T77" style:family="text">
      <style:text-properties style:font-name="Arial1" fo:font-size="12pt" fo:font-style="italic" fo:font-weight="bold" officeooo:rsid="003f82bc" style:font-name-asian="Arial2" style:font-size-asian="12pt" style:font-style-asian="italic" style:font-weight-asian="bold" style:font-name-complex="Arial2" style:font-size-complex="12pt" style:font-style-complex="italic" style:font-weight-complex="bold"/>
    </style:style>
    <style:style style:name="T78" style:family="text">
      <style:text-properties style:font-name="Arial1" fo:font-size="12pt" fo:font-weight="bold" style:font-size-asian="12pt" style:font-size-complex="12pt"/>
    </style:style>
    <style:style style:name="T79" style:family="text">
      <style:text-properties style:font-name="Arial1" fo:font-size="12pt" style:font-size-asian="12pt" style:font-size-complex="12pt"/>
    </style:style>
    <style:style style:name="T80" style:family="text">
      <style:text-properties style:font-name="Arial1" fo:font-size="13pt" fo:font-style="italic" fo:font-weight="bold" officeooo:rsid="00250bdc" style:font-name-asian="Arial2" style:font-size-asian="13pt" style:font-style-asian="italic" style:font-weight-asian="bold" style:font-name-complex="Arial2" style:font-size-complex="13pt" style:font-style-complex="italic" style:font-weight-complex="bold"/>
    </style:style>
    <style:style style:name="T81" style:family="text">
      <style:text-properties style:font-name="Arial1" fo:font-size="13pt" fo:font-style="italic" fo:font-weight="bold" officeooo:rsid="003f9e69" style:font-name-asian="Arial2" style:font-size-asian="13pt" style:font-style-asian="italic" style:font-weight-asian="bold" style:font-name-complex="Arial2" style:font-size-complex="13pt" style:font-style-complex="italic" style:font-weight-complex="bold"/>
    </style:style>
    <style:style style:name="T82" style:family="text">
      <style:text-properties style:font-name="Arial1" fo:font-size="13pt" fo:font-style="italic" fo:font-weight="normal" officeooo:rsid="00250bdc" style:font-name-asian="Arial2" style:font-size-asian="13pt" style:font-style-asian="italic" style:font-weight-asian="normal" style:font-name-complex="Arial2" style:font-size-complex="13pt" style:font-style-complex="italic" style:font-weight-complex="normal"/>
    </style:style>
    <style:style style:name="T83" style:family="text">
      <style:text-properties style:font-name="Arial1" fo:font-size="13pt" fo:font-weight="bold" style:font-size-asian="13pt" style:font-size-complex="13pt"/>
    </style:style>
    <style:style style:name="T84" style:family="text">
      <style:text-properties style:font-name="Arial1" fo:font-size="13pt" style:font-size-asian="13pt" style:font-size-complex="13pt"/>
    </style:style>
    <style:style style:name="T85" style:family="text">
      <style:text-properties style:font-name="Arial1"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86" style:family="text">
      <style:text-properties style:font-name="Arial1" fo:font-size="15pt" fo:font-style="italic" fo:font-weight="bold" officeooo:rsid="003f9e69" style:font-name-asian="Arial2" style:font-size-asian="15pt" style:font-style-asian="italic" style:font-weight-asian="bold" style:font-name-complex="Arial2" style:font-size-complex="15pt" style:font-style-complex="italic" style:font-weight-complex="bold"/>
    </style:style>
    <style:style style:name="T87" style:family="text">
      <style:text-properties style:font-name="Arial1" fo:font-size="15pt" fo:font-style="italic" fo:font-weight="bold" officeooo:rsid="004159cb" style:font-name-asian="Arial2" style:font-size-asian="15pt" style:font-style-asian="italic" style:font-weight-asian="bold" style:font-name-complex="Arial2" style:font-size-complex="15pt" style:font-style-complex="italic" style:font-weight-complex="bold"/>
    </style:style>
    <style:style style:name="T88" style:family="text">
      <style:text-properties style:font-name="Arial1" officeooo:rsid="0048967a"/>
    </style:style>
    <style:style style:name="T89" style:family="text">
      <style:text-properties style:font-name="Arial1" officeooo:rsid="001260f3"/>
    </style:style>
    <style:style style:name="T90" style:family="text">
      <style:text-properties style:font-name="Arial1" officeooo:rsid="004a251f"/>
    </style:style>
    <style:style style:name="T91" style:family="text">
      <style:text-properties style:font-name="Arial1" fo:font-size="14pt" fo:font-weight="bold" style:font-size-asian="14pt" style:font-size-complex="14pt"/>
    </style:style>
    <style:style style:name="T92" style:family="text">
      <style:text-properties style:font-name="Arial1" fo:font-size="14pt" style:font-size-asian="14pt" style:font-size-complex="14pt"/>
    </style:style>
    <style:style style:name="T93" style:family="text">
      <style:text-properties fo:font-size="22pt" fo:font-weight="bold" officeooo:rsid="001260f3" style:font-name-asian="Arial2" style:font-size-asian="22pt" style:font-weight-asian="bold" style:font-name-complex="Arial2" style:font-size-complex="22pt" style:font-weight-complex="bold"/>
    </style:style>
    <style:style style:name="T94" style:family="text">
      <style:text-properties fo:font-size="22pt" officeooo:rsid="001260f3" style:font-name-asian="Arial2" style:font-size-asian="22pt" style:font-name-complex="Arial2" style:font-size-complex="22pt"/>
    </style:style>
    <style:style style:name="T95" style:family="text">
      <style:text-properties fo:font-size="22pt" officeooo:rsid="001260f3" style:font-name-asian="Arial2" style:font-size-asian="22pt" style:font-weight-asian="bold" style:font-name-complex="Arial2" style:font-size-complex="22pt" style:font-weight-complex="bold"/>
    </style:style>
    <style:style style:name="T96" style:family="text">
      <style:text-properties officeooo:rsid="001260f3" style:font-name-asian="Arial2" style:font-name-complex="Arial2"/>
    </style:style>
    <style:style style:name="T97" style:family="text">
      <style:text-properties officeooo:rsid="0048967a"/>
    </style:style>
    <style:style style:name="T98" style:family="text">
      <style:text-properties officeooo:rsid="001260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57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7.52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0.9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94cm, 1.873cm, 0.771cm, 18.1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722cm, 0.71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58cm, -0.004cm, 1.605cm, 18.67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602cm, 17.752cm, 0.77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53cm, 1.302cm, 13.226cm, 17.40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cm, 18.807cm, 14.61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301cm, 1.207cm, 0.413cm, 17.3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7.948cm, 18.803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8.6cm, 3.49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004cm, 2.649cm, 18.658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loext:marker-style-name="T1"><draw:frame draw:style-name="fr16" draw:name="image10.png" text:anchor-type="char" svg:x="-0.485cm" svg:y="0.203cm" svg:width="4.939cm" svg:height="1.446cm" draw:z-index="1"><draw:image xlink:href="Pictures/100000000000012C0000005AEAF22963.png" xlink:type="simple" xlink:show="embed" xlink:actuate="onLoad" draw:mime-type="image/png"/></draw:frame><draw:frame draw:style-name="fr16"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85" loext:marker-style-name="T1"><text:span text:style-name="T1"/></text:p>
      <text:p text:style-name="P85" loext:marker-style-name="T1"><text:span text:style-name="T1">Practica </text:span><text:span text:style-name="T8">1</text:span><text:span text:style-name="T10">3 </text:span><text:span text:style-name="T9">QUEUE QoS MQTT REDIS y SQLite</text:span></text:p>
      <text:p text:style-name="P85" loext:marker-style-name="T11"><text:span text:style-name="T1"/></text:p>
      <text:p text:style-name="P85" loext:marker-style-name="T11"><text:span text:style-name="T1">Nombre del docente:</text:span><text:span text:style-name="T11"><text:line-break/></text:span><text:span text:style-name="T12">Gustavo Moises Romero Gonzalez</text:span></text:p>
      <text:p text:style-name="P85" loext:marker-style-name="T1"><text:span text:style-name="T2">Materia:</text:span></text:p>
      <text:p text:style-name="P85" loext:marker-style-name="T1"><text:span text:style-name="T15">Sistemas Embebidos Aplicados a Móviles</text:span><text:span text:style-name="T1"><text:line-break/></text:span></text:p>
      <text:p text:style-name="P85" loext:marker-style-name="T11"><text:span text:style-name="T1">Nombre del alumno(a):</text:span></text:p>
      <text:p text:style-name="P85" loext:marker-style-name="T11"><text:span text:style-name="T11"><text:line-break/>Cabañas Santamaria Anel Athziri<text:line-break/>Miranda Martinez Alejandro<text:line-break/>Roldan Velazquez Ian Jurguen</text:span></text:p>
      <text:p text:style-name="P101" loext:marker-style-name="T11"/>
      <text:p text:style-name="P86" loext:marker-style-name="T11"><text:soft-page-break/><text:span text:style-name="T5">Objetivo</text:span></text:p>
      <text:p text:style-name="P87" loext:marker-style-name="T11"><text:span text:style-name="T48">Desarrollar y documentar una aplicación modular en Python sobre una arquitectura embebida Raspberry Pi. El sistema lee datos de temperatura y humedad relativa mediante un sensor DHT11, maneja dinámicamente las fluctuaciones o pérdidas de sincronía generadas por el ruido en el bus de datos, e implementa un sistema de graficado interactivo en tiempo real utilizando colas circulares optimizadas en memoria y el motor gráfico de Matplotlib.</text:span><text:span text:style-name="T17"><text:line-break/></text:span><text:span text:style-name="T13"><text:line-break/></text:span></text:p>
      <text:p text:style-name="P89" loext:marker-style-name="T11"><text:span text:style-name="T5">Pasos de configuración</text:span></text:p>
      <text:p text:style-name="P94" loext:marker-style-name="T11"><text:span text:style-name="T13"><text:line-break/></text:span><text:span text:style-name="T30"># 1. Sincronizar listas de paquetes e instalar utilidades de desarrollo y clientes CLI para MQTT:</text:span></text:p>
      <text:p text:style-name="P94" loext:marker-style-name="T11"><text:span text:style-name="T29">sudo apt update &amp;&amp; sudo apt install mosquitto mosquitto-clients python3-pip python3-dev -y</text:span></text:p>
      <text:p text:style-name="P106" loext:marker-style-name="T11"><text:span text:style-name="T28"># 2. Descargar e instalar la biblioteca cliente oficial de MQTT para el entorno de Python:</text:span></text:p>
      <text:p text:style-name="P94" loext:marker-style-name="T11"><text:span text:style-name="T29">pip3 install paho-mqtt</text:span></text:p>
      <text:p text:style-name="P106" loext:marker-style-name="T11"><text:span text:style-name="T28"># 3. Proveer soporte nativo del sistema para el desarrollo y compilación de clientes basados en la biblioteca de Mosquitto en C:</text:span></text:p>
      <text:p text:style-name="P94" loext:marker-style-name="T11"><text:span text:style-name="T29">sudo apt install libmosquitto-dev -y</text:span><text:span text:style-name="T13"><text:line-break/></text:span></text:p>
      <text:p text:style-name="P92" loext:marker-style-name="T11"><text:soft-page-break/><text:span text:style-name="T13"><text:line-break/>Desarrollo de la Practica<text:line-break/><text:line-break/></text:span><text:span text:style-name="T27">En esta practica se dividirá en varias carpetas para</text:span><text:span text:style-name="T26"> identificar</text:span><text:span text:style-name="T27">los</text:span><text:span text:style-name="T26">, </text:span><text:span text:style-name="T27">se mostraran los códigos, que debe de hacer y su ejecución de cada uno de ellos.</text:span></text:p>
      <text:p text:style-name="P88" loext:marker-style-name="T11"><text:span text:style-name="T18">Se creo una carpeta llamada </text:span><text:span text:style-name="T23">P</text:span><text:span text:style-name="T24">13</text:span><text:span text:style-name="T23"> </text:span><text:span text:style-name="T26">p</text:span><text:span text:style-name="T27">ara meter dentro las carias carpetas con sus respectivos archivos</text:span><text:span text:style-name="T26"> y meter el código dentro.</text:span></text:p>
      <text:p text:style-name="P88" loext:marker-style-name="T11"><text:span text:style-name="T26"><text:line-break/></text:span><text:span text:style-name="T23">Raspberry Pi (Python) y Cliente C (Interoperabilidad)</text:span><text:span text:style-name="T26"><text:line-break/><text:line-break/></text:span><text:span text:style-name="T25">P13/1 #Raspberry Pi – mosquito/1 #Terminal</text:span><text:span text:style-name="T17"><text:line-break/><text:line-break/>¿Qué debe de hacer este ejemplo?</text:span></text:p>
      <text:list xml:id="list2124668325" text:style-name="L1">
        <text:list-item>
          <text:p text:style-name="P31"><text:span text:style-name="T41">El Servidor (Broker Mosquitto):</text:span> Funciona como un centro de distribución de correo electrónico. Se queda escuchando en la red esperando que alguien le mande datos o le pida información.</text:p>
        </text:list-item>
        <text:list-item>
          <text:p text:style-name="P30"><text:span text:style-name="T71">El Publicador (Python en la Raspberry Pi):</text:span><text:span text:style-name="T70"> Simula ser un termómetro digital. Cada 2 segundos genera una temperatura aleatoria (ej. </text:span><text:span text:style-name="Source_20_Text"><text:span text:style-name="T70">24.5 °C</text:span></text:span><text:span text:style-name="T70">) y la envía al Broker bajo la etiqueta o canal </text:span><text:span text:style-name="Source_20_Text"><text:span text:style-name="T70">"iot/temperatura"</text:span></text:span><text:span text:style-name="T70">.</text:span></text:p>
        </text:list-item>
        <text:list-item>
          <text:p text:style-name="P30"><text:span text:style-name="T71">El Suscriptor (Cliente C en tu PC Linux):</text:span><text:span text:style-name="T70"> Se conecta al Broker y le dice: </text:span><text:span text:style-name="T73">"Avísame si alguien envía algo al canal </text:span><text:span text:style-name="Source_20_Text"><text:span text:style-name="T73">iot/temperatura</text:span></text:span><text:span text:style-name="T73">"</text:span><text:span text:style-name="T70">. En cuanto el Broker recibe el dato de la Raspberry Pi, se lo reenvía inmediatamente al programa en C, el cual lo imprime en tu pantalla.</text:span><text:span text:style-name="T17"><text:line-break/><text:line-break/><text:line-break/><text:tab/><text:tab/></text:span><text:span text:style-name="T19">Adjunto Programa </text:span><text:span text:style-name="T20">y nombre de archivo</text:span><text:span text:style-name="T19">:</text:span></text:p>
        </text:list-item>
      </text:list>
      <text:p text:style-name="P91" loext:marker-style-name="T11"><text:span text:style-name="T52">P13/1/</text:span><text:span text:style-name="T51">sensor_</text:span><text:span text:style-name="T52">sim</text:span><text:span text:style-name="T50">.py </text:span><text:span text:style-name="T52">#Dentro del Raspberry Pi</text:span></text:p>
      <text:p text:style-name="P110" loext:marker-style-name="T11"><text:span text:style-name="T43">import paho.mqtt.client as mqtt</text:span></text:p>
      <text:p text:style-name="P110" loext:marker-style-name="T11"><text:span text:style-name="T43">import time</text:span></text:p>
      <text:p text:style-name="P110" loext:marker-style-name="T11"><text:span text:style-name="T43">import random</text:span></text:p>
      <text:p text:style-name="P110" loext:marker-style-name="T11"><text:soft-page-break/><text:span text:style-name="T43"/></text:p>
      <text:p text:style-name="P110" loext:marker-style-name="T11"><text:span text:style-name="T43">broker = "10.42.0.117" </text:span></text:p>
      <text:p text:style-name="P110" loext:marker-style-name="T11"><text:span text:style-name="T43">topic = "iot/temperatura"</text:span></text:p>
      <text:p text:style-name="P110" loext:marker-style-name="T11"><text:span text:style-name="T43"/></text:p>
      <text:p text:style-name="P110" loext:marker-style-name="T11"><text:span text:style-name="T43">client = mqtt.Client(mqtt.CallbackAPIVersion.VERSION2, client_id="RaspberryPiPublisher")</text:span></text:p>
      <text:p text:style-name="P110" loext:marker-style-name="T11"><text:span text:style-name="T43"/></text:p>
      <text:p text:style-name="P110" loext:marker-style-name="T11"><text:span text:style-name="T43">try:</text:span></text:p>
      <text:p text:style-name="P110" loext:marker-style-name="T11"><text:span text:style-name="T43"><text:s text:c="4"/>client.connect(broker, 1883, 60)</text:span></text:p>
      <text:p text:style-name="P110" loext:marker-style-name="T11"><text:span text:style-name="T43"><text:s text:c="4"/>print(f"Conectado al broker {broker}. Iniciando transmisión...")</text:span></text:p>
      <text:p text:style-name="P110" loext:marker-style-name="T11"><text:span text:style-name="T43">except Exception as e:</text:span></text:p>
      <text:p text:style-name="P110" loext:marker-style-name="T11"><text:span text:style-name="T43"><text:s text:c="4"/>print(f"Error al conectar al broker: {e}")</text:span></text:p>
      <text:p text:style-name="P110" loext:marker-style-name="T11"><text:span text:style-name="T43"><text:s text:c="4"/>exit(1)</text:span></text:p>
      <text:p text:style-name="P110" loext:marker-style-name="T11"><text:span text:style-name="T43"/></text:p>
      <text:p text:style-name="P110" loext:marker-style-name="T11"><text:span text:style-name="T43">client.loop_start()</text:span></text:p>
      <text:p text:style-name="P110" loext:marker-style-name="T11"><text:span text:style-name="T43"/></text:p>
      <text:p text:style-name="P110" loext:marker-style-name="T11"><text:span text:style-name="T43">try:</text:span></text:p>
      <text:p text:style-name="P110" loext:marker-style-name="T11"><text:span text:style-name="T43"><text:s text:c="4"/>while True:</text:span></text:p>
      <text:p text:style-name="P110" loext:marker-style-name="T11"><text:span text:style-name="T43"><text:s text:c="8"/>temperatura = round(random.uniform(20.0, 30.0), 2)</text:span></text:p>
      <text:p text:style-name="P110" loext:marker-style-name="T11"><text:span text:style-name="T43"><text:s text:c="8"/>client.publish(topic, f"{temperatura}")</text:span></text:p>
      <text:p text:style-name="P110" loext:marker-style-name="T11"><text:span text:style-name="T43"><text:s text:c="8"/>print(f"Publicado: {temperatura} °C")</text:span></text:p>
      <text:p text:style-name="P110" loext:marker-style-name="T11"><text:span text:style-name="T43"><text:s text:c="8"/>time.sleep(2)</text:span></text:p>
      <text:p text:style-name="P110" loext:marker-style-name="T11"><text:span text:style-name="T43">except KeyboardInterrupt:</text:span></text:p>
      <text:p text:style-name="P110" loext:marker-style-name="T11"><text:span text:style-name="T43"><text:s text:c="4"/>print("\nPublicador detenido")</text:span></text:p>
      <text:p text:style-name="P110" loext:marker-style-name="T11"><text:span text:style-name="T43">finally:</text:span></text:p>
      <text:p text:style-name="P110" loext:marker-style-name="T11"><text:span text:style-name="T43"><text:s text:c="4"/>client.loop_stop()</text:span></text:p>
      <text:p text:style-name="P110" loext:marker-style-name="T11"><text:span text:style-name="T43"><text:s text:c="4"/>client.disconnect()</text:span></text:p>
      <text:p text:style-name="P90" loext:marker-style-name="T11"><text:span text:style-name="T43"><text:line-break/></text:span></text:p>
      <text:p text:style-name="P90" loext:marker-style-name="T11"><text:span text:style-name="T52">mosquito/1/cliente_c.c</text:span><text:span text:style-name="T50"> </text:span><text:span text:style-name="T52">#En la terminal de Linux</text:span></text:p>
      <text:p text:style-name="P112" loext:marker-style-name="T11"><text:span text:style-name="T59">#include &lt;stdio.h&gt;</text:span></text:p>
      <text:p text:style-name="P112" loext:marker-style-name="T11"><text:span text:style-name="T59">#include &lt;stdlib.h&gt;</text:span></text:p>
      <text:p text:style-name="P112" loext:marker-style-name="T11"><text:span text:style-name="T59">#include &lt;mosquitto.h&gt;</text:span></text:p>
      <text:p text:style-name="P112" loext:marker-style-name="T11"><text:span text:style-name="T59"/></text:p>
      <text:p text:style-name="P112" loext:marker-style-name="T11"><text:span text:style-name="T59">void mensaje_callback(struct mosquitto *mosq, void *userdata, const struct mosquitto_message *msg) {</text:span></text:p>
      <text:p text:style-name="P112" loext:marker-style-name="T11"><text:soft-page-break/><text:span text:style-name="T59"><text:s text:c="4"/>printf("Mensaje recibido en tópico '%s': %s\n", msg-&gt;topic, (char *)msg-&gt;payload);</text:span></text:p>
      <text:p text:style-name="P112" loext:marker-style-name="T11"><text:span text:style-name="T59"><text:s text:c="4"/>fflush(stdout);</text:span></text:p>
      <text:p text:style-name="P112" loext:marker-style-name="T11"><text:span text:style-name="T59">}</text:span></text:p>
      <text:p text:style-name="P112" loext:marker-style-name="T11"><text:span text:style-name="T59"/></text:p>
      <text:p text:style-name="P112" loext:marker-style-name="T11"><text:span text:style-name="T59">int main() {</text:span></text:p>
      <text:p text:style-name="P112" loext:marker-style-name="T11"><text:span text:style-name="T59"><text:s text:c="4"/>int rc;</text:span></text:p>
      <text:p text:style-name="P112" loext:marker-style-name="T11"><text:span text:style-name="T59"><text:s text:c="4"/>const char *broker_ip = "1</text:span><text:span text:style-name="T60">0.42.0.117</text:span><text:span text:style-name="T59">"; </text:span></text:p>
      <text:p text:style-name="P112" loext:marker-style-name="T11"><text:span text:style-name="T59"/></text:p>
      <text:p text:style-name="P112" loext:marker-style-name="T11"><text:span text:style-name="T59"><text:s text:c="4"/>mosquitto_lib_init();</text:span></text:p>
      <text:p text:style-name="P112" loext:marker-style-name="T11"><text:span text:style-name="T59"><text:s text:c="4"/></text:span></text:p>
      <text:p text:style-name="P112" loext:marker-style-name="T11"><text:span text:style-name="T59"><text:s text:c="4"/>struct mosquitto *mosq = mosquitto_new("ClienteC", true, NULL);</text:span></text:p>
      <text:p text:style-name="P112" loext:marker-style-name="T11"><text:span text:style-name="T59"><text:s text:c="4"/>if (!mosq) {</text:span></text:p>
      <text:p text:style-name="P112" loext:marker-style-name="T11"><text:span text:style-name="T59"><text:s text:c="8"/>fprintf(stderr, "Error al crear el cliente.\n");</text:span></text:p>
      <text:p text:style-name="P112" loext:marker-style-name="T11"><text:span text:style-name="T59"><text:s text:c="8"/>return 1;</text:span></text:p>
      <text:p text:style-name="P112" loext:marker-style-name="T11"><text:span text:style-name="T59"><text:s text:c="4"/>}</text:span></text:p>
      <text:p text:style-name="P112" loext:marker-style-name="T11"><text:span text:style-name="T59"><text:s text:c="4"/></text:span></text:p>
      <text:p text:style-name="P112" loext:marker-style-name="T11"><text:span text:style-name="T59"><text:s text:c="4"/>mosquitto_message_callback_set(mosq, mensaje_callback);</text:span></text:p>
      <text:p text:style-name="P112" loext:marker-style-name="T11"><text:span text:style-name="T59"><text:s text:c="4"/></text:span></text:p>
      <text:p text:style-name="P112" loext:marker-style-name="T11"><text:span text:style-name="T59"><text:s text:c="4"/>printf("Conectando al broker en %s...\n", broker_ip);</text:span></text:p>
      <text:p text:style-name="P112" loext:marker-style-name="T11"><text:span text:style-name="T59"><text:s text:c="4"/>fflush(stdout);</text:span></text:p>
      <text:p text:style-name="P112" loext:marker-style-name="T11"><text:span text:style-name="T59"/></text:p>
      <text:p text:style-name="P112" loext:marker-style-name="T11"><text:span text:style-name="T59"><text:s text:c="4"/>rc = mosquitto_connect(mosq, broker_ip, 1883, 60);</text:span></text:p>
      <text:p text:style-name="P112" loext:marker-style-name="T11"><text:span text:style-name="T59"><text:s text:c="4"/>if (rc != MOSQ_ERR_SUCCESS) {</text:span></text:p>
      <text:p text:style-name="P112" loext:marker-style-name="T11"><text:span text:style-name="T59"><text:s text:c="8"/>fprintf(stderr, "No se pudo conectar: %s\n", mosquitto_strerror(rc));</text:span></text:p>
      <text:p text:style-name="P112" loext:marker-style-name="T11"><text:span text:style-name="T59"><text:s text:c="8"/>return 1;</text:span></text:p>
      <text:p text:style-name="P112" loext:marker-style-name="T11"><text:span text:style-name="T59"><text:s text:c="4"/>}</text:span></text:p>
      <text:p text:style-name="P112" loext:marker-style-name="T11"><text:span text:style-name="T59"><text:s text:c="4"/></text:span></text:p>
      <text:p text:style-name="P112" loext:marker-style-name="T11"><text:span text:style-name="T59"><text:s text:c="4"/>mosquitto_subscribe(mosq, NULL, "iot/temperatura", 0);</text:span></text:p>
      <text:p text:style-name="P112" loext:marker-style-name="T11"><text:span text:style-name="T59"><text:s text:c="4"/>printf("Suscrito exitosamente. Esperando datos...\n");</text:span></text:p>
      <text:p text:style-name="P112" loext:marker-style-name="T11"><text:span text:style-name="T59"><text:s text:c="4"/>fflush(stdout);</text:span></text:p>
      <text:p text:style-name="P112" loext:marker-style-name="T11"><text:span text:style-name="T59"/></text:p>
      <text:p text:style-name="P112" loext:marker-style-name="T11"><text:span text:style-name="T59"><text:s text:c="4"/>mosquitto_loop_forever(mosq, -1, 1);</text:span></text:p>
      <text:p text:style-name="P112" loext:marker-style-name="T11"><text:span text:style-name="T59"><text:s text:c="4"/></text:span></text:p>
      <text:p text:style-name="P112" loext:marker-style-name="T11"><text:span text:style-name="T59"><text:s text:c="4"/>mosquitto_destroy(mosq);</text:span></text:p>
      <text:p text:style-name="P112" loext:marker-style-name="T11"><text:span text:style-name="T59"><text:s text:c="4"/>mosquitto_lib_cleanup();</text:span></text:p>
      <text:p text:style-name="P112" loext:marker-style-name="T11"><text:soft-page-break/><text:span text:style-name="T59"><text:s text:c="4"/>return 0;</text:span></text:p>
      <text:p text:style-name="P93" loext:marker-style-name="T11"><text:span text:style-name="T63">}</text:span></text:p>
      <text:p text:style-name="P52"><text:span text:style-name="T16">Ejecución<text:line-break/></text:span><text:span text:style-name="T31">Esto será dentro de la terminal de linux</text:span><text:span text:style-name="T61"><text:line-break/><text:line-break/>Compila el programa enlazando la librería:</text:span></text:p>
      <text:p text:style-name="P12"><text:span text:style-name="Source_20_Text">gcc cliente_c.c -o cliente_c -lmosquitto</text:span></text:p>
      <text:p text:style-name="P51"><text:span text:style-name="T61">Ejec</text:span><text:span text:style-name="T62">utamos</text:span><text:span text:style-name="T61">:</text:span></text:p>
      <text:p text:style-name="P53"><text:span text:style-name="T64">./cliente_c <text:s/><text:line-break/><text:line-break/></text:span><draw:frame draw:style-name="fr15" draw:name="Imagen2" text:anchor-type="char" svg:x="4.688cm" svg:y="0.871cm" svg:width="8.511cm" svg:height="8.599cm" draw:z-index="4"><draw:image xlink:href="Pictures/100000000000055600000300C3CACEDF.png" xlink:type="simple" xlink:show="embed" xlink:actuate="onLoad" draw:mime-type="image/png"/></draw:frame><text:span text:style-name="T61"><text:line-break/><text:line-break/><text:line-break/><text:line-break/><text:line-break/><text:line-break/></text:span><draw:frame draw:style-name="fr14" draw:name="Imagen4" text:anchor-type="char" svg:x="5.861cm" svg:y="10.278cm" svg:width="8.537cm" svg:height="8.19cm" draw:z-index="5"><draw:image xlink:href="Pictures/100000000000055600000300C3CACEDF.png" xlink:type="simple" xlink:show="embed" xlink:actuate="onLoad" draw:mime-type="image/png"/></draw:frame><text:span text:style-name="T61"><text:line-break/><text:line-break/><text:line-break/><text:line-break/><text:line-break/><text:line-break/><text:line-break/><text:line-break/><text:line-break/></text:span><text:span text:style-name="T74">Y así se vera en el Raspberry Pi, este enviara los datos a la terminal de la pc:<text:line-break/>Ejecutamos: </text:span><text:span text:style-name="T75">pyhton3 sensor_sim.py</text:span><text:span text:style-name="T61"><text:line-break/><text:line-break/><text:line-break/><text:line-break/><text:line-break/><text:line-break/><text:line-break/><text:line-break/><text:line-break/><text:line-break/><text:line-break/><text:line-break/><text:line-break/></text:span><text:soft-page-break/><text:span text:style-name="T85">Práctico con QoS</text:span><text:span text:style-name="T61"><text:line-break/></text:span><text:span text:style-name="T21">P13/2 #Raspberry Pi – mosquito/2 #Terminal</text:span><text:span text:style-name="T61"><text:line-break/><text:line-break/><text:line-break/></text:span><text:span text:style-name="T80">¿Qué debe de hacer esta práctica?</text:span></text:p>
      <text:p text:style-name="P32">A diferencia de un flujo básico de comunicación efímera, el objetivo primordial de esta sección es implementar <text:span text:style-name="T41">Persistencia Offline</text:span> y <text:span text:style-name="T41">Garantía de Entrega</text:span> mediante Calidad de Servicio (QoS 1).</text:p>
      <text:list text:style-name="L2">
        <text:list-item>
          <text:p text:style-name="P33"><text:span text:style-name="T41">El Servidor (Broker Mosquitto):</text:span> Actúa como un gestor inteligente de almacenamiento y reenvío. Si un cliente con sesión persistente se desconecta, el broker reserva una cola de memoria exclusiva para almacenar sus mensajes pendientes.</text:p>
        </text:list-item>
        <text:list-item>
          <text:p text:style-name="P33"><text:span text:style-name="T41">El Publicador (Python en la Raspberry Pi):</text:span> Simula un nodo sensor térmico. Transmite lecturas aleatorias cada 2 segundos utilizando estrictamente un nivel de <text:span text:style-name="T41">QoS 1</text:span>, obligando al Broker a confirmar de recibido y retener el mensaje si no hay destinatarios activos.</text:p>
        </text:list-item>
        <text:list-item>
          <text:p text:style-name="P66"><text:span text:style-name="T71">El Suscriptor (Cliente C Persistente en PC Linux):</text:span><text:span text:style-name="T70"> Se conecta configurando su bandera interna </text:span><text:span text:style-name="Source_20_Text"><text:span text:style-name="T70">clean_session = false</text:span></text:span><text:span text:style-name="T70"> y un </text:span><text:span text:style-name="T71">ID de Cliente estático</text:span><text:span text:style-name="T70">. Esto le exige al Broker que mantenga su suscripción viva incluso si el programa se apaga o la red falla.</text:span></text:p>
        </text:list-item>
      </text:list>
      <text:p text:style-name="P34"><text:span text:style-name="T45"/></text:p>
      <text:list text:continue-list="list2124668325" text:style-name="L1">
        <text:list-header>
          <text:p text:style-name="P20"><text:span text:style-name="T19">Adjunto Programa </text:span><text:span text:style-name="T20">y nombre de archivo</text:span><text:span text:style-name="T19">:</text:span></text:p>
        </text:list-header>
      </text:list>
      <text:p text:style-name="P95" loext:marker-style-name="T11"><text:span text:style-name="T52">P13/</text:span><text:span text:style-name="T53">2</text:span><text:span text:style-name="T52">/</text:span><text:span text:style-name="T51">sensor_</text:span><text:span text:style-name="T53">qos</text:span><text:span text:style-name="T50">.py </text:span><text:span text:style-name="T52">#Dentro del Raspberry Pi</text:span></text:p>
      <text:p text:style-name="P111" loext:marker-style-name="T11"><text:span text:style-name="T67">import paho.mqtt.client as mqtt</text:span></text:p>
      <text:p text:style-name="P111" loext:marker-style-name="T11"><text:span text:style-name="T67">import time</text:span></text:p>
      <text:p text:style-name="P111" loext:marker-style-name="T11"><text:span text:style-name="T67">import random</text:span></text:p>
      <text:p text:style-name="P111" loext:marker-style-name="T11"><text:span text:style-name="T67"/></text:p>
      <text:p text:style-name="P111" loext:marker-style-name="T11"><text:span text:style-name="T67">broker = "10.42.0.117" <text:s/># IP asignada a la Raspberry Pi</text:span></text:p>
      <text:p text:style-name="P111" loext:marker-style-name="T11"><text:span text:style-name="T67">topic = "iot/qos/temp"</text:span></text:p>
      <text:p text:style-name="P111" loext:marker-style-name="T11"><text:span text:style-name="T67">qos_level = 1</text:span></text:p>
      <text:p text:style-name="P111" loext:marker-style-name="T11"><text:span text:style-name="T67"/></text:p>
      <text:p text:style-name="P111" loext:marker-style-name="T11"><text:span text:style-name="T67">client = mqtt.Client(mqtt.CallbackAPIVersion.VERSION2, client_id="RaspberryPiQoSPub")</text:span></text:p>
      <text:p text:style-name="P111" loext:marker-style-name="T11"><text:span text:style-name="T67"/></text:p>
      <text:p text:style-name="P111" loext:marker-style-name="T11"><text:span text:style-name="T67">print(f"Conectando al broker en {broker}...")</text:span></text:p>
      <text:p text:style-name="P111" loext:marker-style-name="T11"><text:span text:style-name="T67">try:</text:span></text:p>
      <text:p text:style-name="P111" loext:marker-style-name="T11"><text:soft-page-break/><text:span text:style-name="T67"><text:s text:c="4"/>client.connect(broker, 1883, 60)</text:span></text:p>
      <text:p text:style-name="P111" loext:marker-style-name="T11"><text:span text:style-name="T67"><text:s text:c="4"/>print("¡Conectado exitosamente!")</text:span></text:p>
      <text:p text:style-name="P111" loext:marker-style-name="T11"><text:span text:style-name="T67">except Exception as e:</text:span></text:p>
      <text:p text:style-name="P111" loext:marker-style-name="T11"><text:span text:style-name="T67"><text:s text:c="4"/>print(f"Error de conexión: {e}")</text:span></text:p>
      <text:p text:style-name="P111" loext:marker-style-name="T11"><text:span text:style-name="T67"><text:s text:c="4"/>exit(1)</text:span></text:p>
      <text:p text:style-name="P111" loext:marker-style-name="T11"><text:span text:style-name="T67"/></text:p>
      <text:p text:style-name="P111" loext:marker-style-name="T11"><text:span text:style-name="T67">client.loop_start()</text:span></text:p>
      <text:p text:style-name="P111" loext:marker-style-name="T11"><text:span text:style-name="T67"/></text:p>
      <text:p text:style-name="P111" loext:marker-style-name="T11"><text:span text:style-name="T67">try:</text:span></text:p>
      <text:p text:style-name="P111" loext:marker-style-name="T11"><text:span text:style-name="T67"><text:s text:c="4"/>print(f"Publicando en '{topic}' con QoS {qos_level} (Modo Persistente)...")</text:span></text:p>
      <text:p text:style-name="P111" loext:marker-style-name="T11"><text:span text:style-name="T67"><text:s text:c="4"/>while True:</text:span></text:p>
      <text:p text:style-name="P111" loext:marker-style-name="T11"><text:span text:style-name="T67"><text:s text:c="8"/>temp = round(random.uniform(20.0, 30.0), 2)</text:span></text:p>
      <text:p text:style-name="P111" loext:marker-style-name="T11"><text:span text:style-name="T67"><text:s text:c="8"/></text:span></text:p>
      <text:p text:style-name="P111" loext:marker-style-name="T11"><text:span text:style-name="T67"><text:s text:c="8"/>client.publish(topic, f"{temp}", qos=qos_level)</text:span></text:p>
      <text:p text:style-name="P111" loext:marker-style-name="T11"><text:span text:style-name="T67"><text:s text:c="8"/>print(f"Publicado: {temp} °C")</text:span></text:p>
      <text:p text:style-name="P111" loext:marker-style-name="T11"><text:span text:style-name="T67"><text:s text:c="8"/>time.sleep(2)</text:span></text:p>
      <text:p text:style-name="P111" loext:marker-style-name="T11"><text:span text:style-name="T67"><text:s text:c="8"/></text:span></text:p>
      <text:p text:style-name="P111" loext:marker-style-name="T11"><text:span text:style-name="T67">except KeyboardInterrupt:</text:span></text:p>
      <text:p text:style-name="P111" loext:marker-style-name="T11"><text:span text:style-name="T67"><text:s text:c="4"/>print("\nPublicador detenido por el usuario.")</text:span></text:p>
      <text:p text:style-name="P111" loext:marker-style-name="T11"><text:span text:style-name="T67">finally:</text:span></text:p>
      <text:p text:style-name="P111" loext:marker-style-name="T11"><text:span text:style-name="T67"><text:s text:c="4"/>client.loop_stop()</text:span></text:p>
      <text:p text:style-name="P111" loext:marker-style-name="T11"><text:span text:style-name="T67"><text:s text:c="4"/>client.disconnect()</text:span></text:p>
      <text:p text:style-name="P53"><text:span text:style-name="T61"/></text:p>
      <text:p text:style-name="P95" loext:marker-style-name="T11"><text:span text:style-name="T53">mosquito</text:span><text:span text:style-name="T52">/</text:span><text:span text:style-name="T53">2</text:span><text:span text:style-name="T52">/</text:span><text:span text:style-name="T53">cliente</text:span><text:span text:style-name="T51">_</text:span><text:span text:style-name="T53">c</text:span><text:span text:style-name="T50">.</text:span><text:span text:style-name="T53">c</text:span><text:span text:style-name="T50"> </text:span><text:span text:style-name="T52">#Dentro de </text:span><text:span text:style-name="T53">la Terminal</text:span></text:p>
      <text:p text:style-name="P107" loext:marker-style-name="T11"><text:span text:style-name="T66">#include &lt;stdio.h&gt;</text:span></text:p>
      <text:p text:style-name="P107" loext:marker-style-name="T11"><text:span text:style-name="T66">#include &lt;stdlib.h&gt;</text:span></text:p>
      <text:p text:style-name="P107" loext:marker-style-name="T11"><text:span text:style-name="T66">#include &lt;mosquitto.h&gt;</text:span></text:p>
      <text:p text:style-name="P107" loext:marker-style-name="T11"><text:span text:style-name="T66"/></text:p>
      <text:p text:style-name="P107" loext:marker-style-name="T11"><text:span text:style-name="T66">void mensaje_callback(struct mosquitto *mosq, void *userdata, const struct mosquitto_message *msg) {</text:span></text:p>
      <text:p text:style-name="P107" loext:marker-style-name="T11"><text:span text:style-name="T66"><text:s text:c="4"/>printf("Recibido [%s]: %s (QoS de entrega: %d)\n", msg-&gt;topic, (char *)msg-&gt;payload, msg-&gt;qos);</text:span></text:p>
      <text:p text:style-name="P107" loext:marker-style-name="T11"><text:span text:style-name="T66"><text:s text:c="4"/>fflush(stdout);</text:span></text:p>
      <text:p text:style-name="P107" loext:marker-style-name="T11"><text:span text:style-name="T66">}</text:span></text:p>
      <text:p text:style-name="P107" loext:marker-style-name="T11"><text:soft-page-break/><text:span text:style-name="T66"/></text:p>
      <text:p text:style-name="P107" loext:marker-style-name="T11"><text:span text:style-name="T66">int main() {</text:span></text:p>
      <text:p text:style-name="P107" loext:marker-style-name="T11"><text:span text:style-name="T66"><text:s text:c="4"/>int qos = 1;</text:span></text:p>
      <text:p text:style-name="P107" loext:marker-style-name="T11"><text:span text:style-name="T66"><text:s text:c="4"/>int rc;</text:span></text:p>
      <text:p text:style-name="P107" loext:marker-style-name="T11"><text:span text:style-name="T66"><text:s text:c="4"/>const char *broker_ip = "10.42.0.117"; </text:span></text:p>
      <text:p text:style-name="P107" loext:marker-style-name="T11"><text:span text:style-name="T66"/></text:p>
      <text:p text:style-name="P107" loext:marker-style-name="T11"><text:span text:style-name="T66"><text:s text:c="4"/>mosquitto_lib_init();</text:span></text:p>
      <text:p text:style-name="P107" loext:marker-style-name="T11"><text:span text:style-name="T66"><text:s text:c="4"/></text:span></text:p>
      <text:p text:style-name="P107" loext:marker-style-name="T11"><text:span text:style-name="T66"><text:s text:c="4"/>struct mosquitto *mosq = mosquitto_new("ClienteQoSC", false, NULL);</text:span></text:p>
      <text:p text:style-name="P107" loext:marker-style-name="T11"><text:span text:style-name="T66"><text:s text:c="4"/>if (!mosq) {</text:span></text:p>
      <text:p text:style-name="P107" loext:marker-style-name="T11"><text:span text:style-name="T66"><text:s text:c="8"/>fprintf(stderr, "Error crítico: No se pudo instanciar el cliente Mosquitto.\n");</text:span></text:p>
      <text:p text:style-name="P107" loext:marker-style-name="T11"><text:span text:style-name="T66"><text:s text:c="8"/>return 1;</text:span></text:p>
      <text:p text:style-name="P107" loext:marker-style-name="T11"><text:span text:style-name="T66"><text:s text:c="4"/>}</text:span></text:p>
      <text:p text:style-name="P107" loext:marker-style-name="T11"><text:span text:style-name="T66"/></text:p>
      <text:p text:style-name="P107" loext:marker-style-name="T11"><text:span text:style-name="T66"><text:s text:c="4"/>mosquitto_message_callback_set(mosq, mensaje_callback);</text:span></text:p>
      <text:p text:style-name="P107" loext:marker-style-name="T11"><text:span text:style-name="T66"><text:s text:c="4"/></text:span></text:p>
      <text:p text:style-name="P107" loext:marker-style-name="T11"><text:span text:style-name="T66"><text:s text:c="4"/>printf("Conectando de forma persistente al Broker en %s...\n", broker_ip);</text:span></text:p>
      <text:p text:style-name="P107" loext:marker-style-name="T11"><text:span text:style-name="T66"><text:s text:c="4"/>fflush(stdout);</text:span></text:p>
      <text:p text:style-name="P107" loext:marker-style-name="T11"><text:span text:style-name="T66"/></text:p>
      <text:p text:style-name="P107" loext:marker-style-name="T11"><text:span text:style-name="T66"><text:s text:c="4"/>rc = mosquitto_connect(mosq, broker_ip, 1883, 60);</text:span></text:p>
      <text:p text:style-name="P107" loext:marker-style-name="T11"><text:span text:style-name="T66"><text:s text:c="4"/>if (rc != MOSQ_ERR_SUCCESS) {</text:span></text:p>
      <text:p text:style-name="P107" loext:marker-style-name="T11"><text:span text:style-name="T66"><text:s text:c="8"/>fprintf(stderr, "Error de conexión: %s\n", mosquitto_strerror(rc));</text:span></text:p>
      <text:p text:style-name="P107" loext:marker-style-name="T11"><text:span text:style-name="T66"><text:s text:c="8"/>mosquitto_destroy(mosq);</text:span></text:p>
      <text:p text:style-name="P107" loext:marker-style-name="T11"><text:span text:style-name="T66"><text:s text:c="8"/>mosquitto_lib_cleanup();</text:span></text:p>
      <text:p text:style-name="P107" loext:marker-style-name="T11"><text:span text:style-name="T66"><text:s text:c="8"/>return 1;</text:span></text:p>
      <text:p text:style-name="P107" loext:marker-style-name="T11"><text:span text:style-name="T66"><text:s text:c="4"/>}</text:span></text:p>
      <text:p text:style-name="P107" loext:marker-style-name="T11"><text:span text:style-name="T66"/></text:p>
      <text:p text:style-name="P107" loext:marker-style-name="T11"><text:span text:style-name="T66"><text:s text:c="4"/>printf("¡Conexión establecida! Suscribiendo a canales...\n");</text:span></text:p>
      <text:p text:style-name="P107" loext:marker-style-name="T11"><text:span text:style-name="T66"><text:s text:c="4"/>fflush(stdout);</text:span></text:p>
      <text:p text:style-name="P107" loext:marker-style-name="T11"><text:span text:style-name="T66"/></text:p>
      <text:p text:style-name="P107" loext:marker-style-name="T11"><text:span text:style-name="T66"><text:s text:c="4"/>mosquitto_subscribe(mosq, NULL, "iot/qos/temp", qos);</text:span></text:p>
      <text:p text:style-name="P107" loext:marker-style-name="T11"><text:span text:style-name="T66"><text:s text:c="4"/></text:span></text:p>
      <text:p text:style-name="P107" loext:marker-style-name="T11"><text:span text:style-name="T66"><text:s text:c="4"/>mosquitto_loop_forever(mosq, -1, 1);</text:span></text:p>
      <text:p text:style-name="P107" loext:marker-style-name="T11"><text:span text:style-name="T66"/></text:p>
      <text:p text:style-name="P107" loext:marker-style-name="T11"><text:span text:style-name="T66"><text:s text:c="4"/>mosquitto_destroy(mosq);</text:span></text:p>
      <text:p text:style-name="P107" loext:marker-style-name="T11"><text:soft-page-break/><text:span text:style-name="T66"><text:s text:c="4"/>mosquitto_lib_cleanup();</text:span></text:p>
      <text:p text:style-name="P107" loext:marker-style-name="T11"><text:span text:style-name="T66"><text:s text:c="4"/>return 0;</text:span></text:p>
      <text:p text:style-name="P107" loext:marker-style-name="T11"><text:span text:style-name="T66">}</text:span></text:p>
      <text:p text:style-name="P53"/>
      <text:p text:style-name="P54"><text:span text:style-name="T16">Ejecución<text:line-break/></text:span><text:span text:style-name="T31">Esto será dentro de la terminal de linux</text:span><text:span text:style-name="T61"><text:line-break/><text:line-break/>Compila el programa enlazando la librería:</text:span></text:p>
      <text:p text:style-name="P13"><text:span text:style-name="Source_20_Text">gcc cliente_c.c -o cliente_c -lmosquitto</text:span></text:p>
      <text:p text:style-name="P54"><text:span text:style-name="T61">Ejec</text:span><text:span text:style-name="T62">utamos</text:span><text:span text:style-name="T61">:</text:span></text:p>
      <text:p text:style-name="P54"><text:span text:style-name="T64">./cliente_c <text:s/><text:line-break/> </text:span><text:span text:style-name="T74">Y así se vera en el Raspberry Pi, este enviara los datos a la terminal de la pc:<text:line-break/>Ejecutamos: </text:span><text:span text:style-name="T75">pyhton3 sensor_</text:span><text:span text:style-name="T77">qos</text:span><text:span text:style-name="T75">.py</text:span></text:p>
      <text:p text:style-name="P55"><text:span text:style-name="T64"><text:line-break/><text:line-break/></text:span><text:span text:style-name="T61"><text:line-break/><text:line-break/></text:span></text:p>
      <text:p text:style-name="P55"><draw:frame draw:style-name="fr3" draw:name="Imagen5" text:anchor-type="char" svg:x="-0.968cm" svg:y="-0.153cm" svg:width="19.59cm" svg:height="11.012cm" draw:z-index="6"><draw:image xlink:href="Pictures/1000000000000556000003006AC24F39.png" xlink:type="simple" xlink:show="embed" xlink:actuate="onLoad" draw:mime-type="image/png"/></draw:frame><text:span text:style-name="T61"/></text:p>
      <text:p text:style-name="P55"><text:soft-page-break/><text:span text:style-name="T61"><text:line-break/><text:line-break/></text:span><text:span text:style-name="T86">Pr</text:span><text:span text:style-name="T85">ácticos con Python (Paho-MQTT)</text:span><text:span text:style-name="T61"><text:line-break/></text:span><text:span text:style-name="T21">P13/</text:span><text:span text:style-name="T22">3</text:span><text:span text:style-name="T21"> #Raspberry Pi – mosquito/</text:span><text:span text:style-name="T22">3</text:span><text:span text:style-name="T21"> #Terminal</text:span><text:span text:style-name="T61"><text:line-break/><text:line-break/></text:span><text:span text:style-name="T86">A. Q</text:span><text:span text:style-name="T85">oS 0 – “At most once” (A lo sumo una vez)<text:line-break/></text:span><text:span text:style-name="T82">En este nivel de servicio, el mensaje se envía con un enfoque de "dispara y olvida". No existen mecanismos de confirmación ni almacenamiento en el broker.</text:span><text:span text:style-name="T61"><text:line-break/></text:span></text:p>
      <text:p text:style-name="P55"><text:span text:style-name="T80">¿Qué debe de hacer est</text:span><text:span text:style-name="T81">e</text:span><text:span text:style-name="T80"> </text:span><text:span text:style-name="T81">ejemplo</text:span><text:span text:style-name="T80">?</text:span></text:p>
      <text:p text:style-name="P35">El publicador inyecta un único mensaje en el broker y cierra la conexión de inmediato. Si el suscriptor no se encuentra en línea en ese microsegundo, o si existe una fluctuación en el enlace inalámbrico, el dato se pierde de manera definitiva sin que se genere ningún intento de retransmisión.<text:line-break/></text:p>
      <text:list xml:id="list200540631733553" text:continue-numbering="true" text:style-name="L1">
        <text:list-header>
          <text:p text:style-name="P21"><text:span text:style-name="T19">Adjunto Programa </text:span><text:span text:style-name="T20">y nombre de archivo</text:span><text:span text:style-name="T19">:</text:span></text:p>
        </text:list-header>
      </text:list>
      <text:p text:style-name="P96" loext:marker-style-name="T11"><text:span text:style-name="T52">P13/</text:span><text:span text:style-name="T54">3</text:span><text:span text:style-name="T52">/</text:span><text:span text:style-name="T54">publishe</text:span><text:span text:style-name="T51">r_</text:span><text:span text:style-name="T53">qos</text:span><text:span text:style-name="T54">0</text:span><text:span text:style-name="T50">.py </text:span><text:span text:style-name="T52">#Dentro del Raspberry Pi</text:span></text:p>
      <text:p text:style-name="P58"><text:span text:style-name="T67">import paho.mqtt.client as mqtt</text:span></text:p>
      <text:p text:style-name="P58"><text:span text:style-name="T67"/></text:p>
      <text:p text:style-name="P58"><text:span text:style-name="T67">broker = "10.42.0.117"</text:span></text:p>
      <text:p text:style-name="P58"><text:span text:style-name="T67">topic = "sala/temperatura"</text:span></text:p>
      <text:p text:style-name="P58"><text:span text:style-name="T67">mensaje = "Temp: 24.5 °C"</text:span></text:p>
      <text:p text:style-name="P58"><text:span text:style-name="T67"/></text:p>
      <text:p text:style-name="P58"><text:span text:style-name="T67">client = mqtt.Client(mqtt.CallbackAPIVersion.VERSION2, client_id="PubQoS0")</text:span></text:p>
      <text:p text:style-name="P58"><text:span text:style-name="T67"/></text:p>
      <text:p text:style-name="P58"><text:span text:style-name="T67">try:</text:span></text:p>
      <text:p text:style-name="P58"><text:span text:style-name="T67"><text:s text:c="4"/>client.connect(broker, 1883, 60)</text:span></text:p>
      <text:p text:style-name="P58"><text:span text:style-name="T67"><text:s text:c="4"/>client.loop_start() <text:s/># Maneja el tráfico de red interno</text:span></text:p>
      <text:p text:style-name="P58"><text:span text:style-name="T67"><text:s text:c="4"/></text:span></text:p>
      <text:p text:style-name="P58"><text:span text:style-name="T67"><text:s text:c="4"/>client.publish(topic, mensaje, qos=0)</text:span></text:p>
      <text:p text:style-name="P58"><text:span text:style-name="T67"><text:s text:c="4"/>print(f"[QoS 0] Publicado de forma directa: {mensaje}")</text:span></text:p>
      <text:p text:style-name="P58"><text:span text:style-name="T67"><text:s text:c="4"/></text:span></text:p>
      <text:p text:style-name="P58"><text:soft-page-break/><text:span text:style-name="T67">except Exception as e:</text:span></text:p>
      <text:p text:style-name="P58"><text:span text:style-name="T67"><text:s text:c="4"/>print(f"Error en el publicador: {e}")</text:span></text:p>
      <text:p text:style-name="P58"><text:span text:style-name="T67">finally:</text:span></text:p>
      <text:p text:style-name="P58"><text:span text:style-name="T67"><text:s text:c="4"/>client.loop_stop()</text:span></text:p>
      <text:p text:style-name="P58"><text:span text:style-name="T67"><text:s text:c="4"/>client.disconnect()</text:span><text:span text:style-name="T61"><text:line-break/><text:line-break/><text:line-break/></text:span><text:span text:style-name="T54">mosquito/3</text:span><text:span text:style-name="T52">/subscriber_qos0.py</text:span><text:span text:style-name="T50"> </text:span><text:span text:style-name="T52">#Dentro de </text:span><text:span text:style-name="T54">la Terminal</text:span></text:p>
      <text:p text:style-name="P58"><text:span text:style-name="T67">import paho.mqtt.client as mqtt</text:span></text:p>
      <text:p text:style-name="P58"><text:span text:style-name="T67"/></text:p>
      <text:p text:style-name="P58"><text:span text:style-name="T67">broker = "10.42.0.117"</text:span></text:p>
      <text:p text:style-name="P58"><text:span text:style-name="T67">topic = "sala/temperatura"</text:span></text:p>
      <text:p text:style-name="P58"><text:span text:style-name="T67"/></text:p>
      <text:p text:style-name="P58"><text:span text:style-name="T67">def on_message(client, userdata, msg):</text:span></text:p>
      <text:p text:style-name="P58"><text:span text:style-name="T67"><text:s text:c="4"/>print(f"[QoS 0] Mensaje recibido en canal: {msg.payload.decode()}")</text:span></text:p>
      <text:p text:style-name="P58"><text:span text:style-name="T67"/></text:p>
      <text:p text:style-name="P58"><text:span text:style-name="T67">client = mqtt.Client(mqtt.CallbackAPIVersion.VERSION2, client_id="SubQoS0")</text:span></text:p>
      <text:p text:style-name="P58"><text:span text:style-name="T67">client.on_message = on_message</text:span></text:p>
      <text:p text:style-name="P58"><text:span text:style-name="T67"/></text:p>
      <text:p text:style-name="P58"><text:span text:style-name="T67">try:</text:span></text:p>
      <text:p text:style-name="P58"><text:span text:style-name="T67"><text:s text:c="4"/>client.connect(broker, 1883, 60)</text:span></text:p>
      <text:p text:style-name="P58"><text:span text:style-name="T67"><text:s text:c="4"/>client.subscribe(topic, qos=0)</text:span></text:p>
      <text:p text:style-name="P58"><text:span text:style-name="T67"><text:s text:c="4"/>client.loop_start()</text:span></text:p>
      <text:p text:style-name="P58"><text:span text:style-name="T67"><text:s text:c="4"/></text:span></text:p>
      <text:p text:style-name="P58"><text:span text:style-name="T67"><text:s text:c="4"/>input("Presiona Enter para finalizar el proceso del Suscriptor QoS 0...\n")</text:span></text:p>
      <text:p text:style-name="P58"><text:span text:style-name="T67"><text:s text:c="4"/></text:span></text:p>
      <text:p text:style-name="P58"><text:span text:style-name="T67">except KeyboardInterrupt:</text:span></text:p>
      <text:p text:style-name="P58"><text:span text:style-name="T67"><text:s text:c="4"/>pass</text:span></text:p>
      <text:p text:style-name="P58"><text:span text:style-name="T67">finally:</text:span></text:p>
      <text:p text:style-name="P58"><text:span text:style-name="T67"><text:s text:c="4"/>client.loop_stop()</text:span></text:p>
      <text:p text:style-name="P58"><text:soft-page-break/><text:span text:style-name="T67"><text:s text:c="4"/>client.disconnect()</text:span><text:span text:style-name="T61"><text:line-break/><text:line-break/><text:line-break/></text:span><text:span text:style-name="T76">Características técnicas de QoS 0:</text:span></text:p>
      <text:list text:style-name="L3">
        <text:list-item>
          <text:p text:style-name="P36"><text:span text:style-name="T41">Sin confirmación:</text:span> El emisor no recibe acuse de recibo del broker ni del destino.</text:p>
        </text:list-item>
        <text:list-item>
          <text:p text:style-name="P36"><text:span text:style-name="T41">Tolerancia cero a fallos:</text:span> Si se pierde el mensaje en tránsito, no se reintenta.</text:p>
        </text:list-item>
        <text:list-item>
          <text:p text:style-name="P36"><text:span text:style-name="T41">Máxima optimización:</text:span> Es el nivel más eficiente, rápido y con menor consumo de ancho de banda y energía.</text:p>
        </text:list-item>
      </text:list>
      <text:p text:style-name="P55"><text:span text:style-name="T61"><text:line-break/></text:span><text:span text:style-name="T16">Ejecución<text:line-break/></text:span><text:span text:style-name="T61"><text:line-break/><text:line-break/></text:span><draw:frame draw:style-name="fr3" draw:name="Imagen6" text:anchor-type="char" svg:x="-0.647cm" svg:y="2.429cm" svg:width="18.925cm" svg:height="10.64cm" draw:z-index="7"><draw:image xlink:href="Pictures/1000000000000556000003007B330089.png" xlink:type="simple" xlink:show="embed" xlink:actuate="onLoad" draw:mime-type="image/png"/></draw:frame><text:span text:style-name="T61"><text:line-break/><text:line-break/><text:line-break/><text:line-break/><text:line-break/><text:line-break/><text:line-break/><text:line-break/></text:span><text:soft-page-break/><text:span text:style-name="T86">B. Q</text:span><text:span text:style-name="T85">oS </text:span><text:span text:style-name="T87">1</text:span><text:span text:style-name="T85"> – “At </text:span><text:span text:style-name="T87">least</text:span><text:span text:style-name="T85"> once” (A</text:span><text:span text:style-name="T87">l</text:span><text:span text:style-name="T85"> </text:span><text:span text:style-name="T87">menos</text:span><text:span text:style-name="T85"> una vez)<text:line-break/></text:span><text:span text:style-name="T82">Este nivel garantiza que el mensaje llegue al destino de forma obligatoria, permitiendo la existencia de duplicados si ocurren problemas de confirmación en la red.</text:span><text:span text:style-name="T61"><text:line-break/></text:span></text:p>
      <text:p text:style-name="P26"><text:span text:style-name="T80">¿Qué debe de hacer est</text:span><text:span text:style-name="T81">e</text:span><text:span text:style-name="T80"> </text:span><text:span text:style-name="T81">ejemplo</text:span><text:span text:style-name="T80">?</text:span></text:p>
      <text:p text:style-name="P37"><text:span text:style-name="T46">El publicador transmite el dato de humedad y detiene su flujo síncrono hasta recibir un paquete de confirmación (</text:span><text:span text:style-name="Source_20_Text"><text:span text:style-name="T47">PUBACK</text:span></text:span><text:span text:style-name="T46">) por parte del Broker. Si el token de confirmación se pierde en la red debido a ruido, el publicador retransmitirá el mensaje, provocando que el receptor pueda procesar el mismo dato más de una vez.</text:span></text:p>
      <text:p text:style-name="P53"><text:span text:style-name="T61"/></text:p>
      <text:list xml:id="list200541588527550" text:continue-list="list200540631733553" text:style-name="L1">
        <text:list-header>
          <text:p text:style-name="P21"><text:span text:style-name="T19">Adjunto Programa </text:span><text:span text:style-name="T20">y nombre de archivo</text:span><text:span text:style-name="T19">:</text:span></text:p>
        </text:list-header>
      </text:list>
      <text:p text:style-name="P96" loext:marker-style-name="T11"><text:span text:style-name="T52">P13/</text:span><text:span text:style-name="T54">3</text:span><text:span text:style-name="T52">/</text:span><text:span text:style-name="T54">publishe</text:span><text:span text:style-name="T51">r_</text:span><text:span text:style-name="T53">qos</text:span><text:span text:style-name="T55">1</text:span><text:span text:style-name="T50">.py </text:span><text:span text:style-name="T52">#Dentro del Raspberry Pi</text:span></text:p>
      <text:p text:style-name="P58"><text:span text:style-name="T67">import paho.mqtt.client as mqtt</text:span></text:p>
      <text:p text:style-name="P58"><text:span text:style-name="T67"/></text:p>
      <text:p text:style-name="P58"><text:span text:style-name="T67">broker = "10.42.0.117"</text:span></text:p>
      <text:p text:style-name="P58"><text:span text:style-name="T67">topic = "sala/humedad"</text:span></text:p>
      <text:p text:style-name="P58"><text:span text:style-name="T67">mensaje = "Humedad: 60%"</text:span></text:p>
      <text:p text:style-name="P58"><text:span text:style-name="T67"/></text:p>
      <text:p text:style-name="P58"><text:span text:style-name="T67">client = mqtt.Client(mqtt.CallbackAPIVersion.VERSION2, client_id="PubQoS1")</text:span></text:p>
      <text:p text:style-name="P58"><text:span text:style-name="T67"/></text:p>
      <text:p text:style-name="P58"><text:span text:style-name="T67">try:</text:span></text:p>
      <text:p text:style-name="P58"><text:span text:style-name="T67"><text:s text:c="4"/>client.connect(broker, 1883, 60)</text:span></text:p>
      <text:p text:style-name="P58"><text:span text:style-name="T67"><text:s text:c="4"/>client.loop_start()</text:span></text:p>
      <text:p text:style-name="P58"><text:span text:style-name="T67"><text:s text:c="4"/></text:span></text:p>
      <text:p text:style-name="P58"><text:span text:style-name="T67"><text:s text:c="4"/># Publicación con QoS 1 (Requiere Handshake básico)</text:span></text:p>
      <text:p text:style-name="P58"><text:span text:style-name="T67"><text:s text:c="4"/>info = client.publish(topic, mensaje, qos=1)</text:span></text:p>
      <text:p text:style-name="P58"><text:span text:style-name="T67"><text:s text:c="4"/>info.wait_for_publish() <text:s/># Bloqueo controlado hasta recibir el PUBACK</text:span></text:p>
      <text:p text:style-name="P58"><text:span text:style-name="T67"><text:s text:c="4"/></text:span></text:p>
      <text:p text:style-name="P58"><text:span text:style-name="T67"><text:s text:c="4"/>print(f"[QoS 1] Publicado y confirmado por Broker: {mensaje}")</text:span></text:p>
      <text:p text:style-name="P58"><text:span text:style-name="T67"><text:s text:c="4"/></text:span></text:p>
      <text:p text:style-name="P58"><text:span text:style-name="T67">except Exception as e:</text:span></text:p>
      <text:p text:style-name="P58"><text:soft-page-break/><text:span text:style-name="T67"><text:s text:c="4"/>print(f"Error: {e}")</text:span></text:p>
      <text:p text:style-name="P58"><text:span text:style-name="T67">finally:</text:span></text:p>
      <text:p text:style-name="P58"><text:span text:style-name="T67"><text:s text:c="4"/>client.loop_stop()</text:span></text:p>
      <text:p text:style-name="P58"><text:span text:style-name="T67"><text:s text:c="4"/>client.disconnect()</text:span></text:p>
      <text:p text:style-name="P97" loext:marker-style-name="T11"><text:span text:style-name="T55">mosquito</text:span><text:span text:style-name="T52">/</text:span><text:span text:style-name="T54">3/subscriber_qos1.py</text:span><text:span text:style-name="T50"> </text:span><text:span text:style-name="T52">#Dentro de </text:span><text:span text:style-name="T55">la Terminal</text:span></text:p>
      <text:p text:style-name="P60"><text:span text:style-name="T67">import paho.mqtt.client as mqtt</text:span></text:p>
      <text:p text:style-name="P60"><text:span text:style-name="T67"/></text:p>
      <text:p text:style-name="P60"><text:span text:style-name="T67">broker = "10.42.0.117"</text:span></text:p>
      <text:p text:style-name="P60"><text:span text:style-name="T67">topic = "sala/humedad"</text:span></text:p>
      <text:p text:style-name="P60"><text:span text:style-name="T67"/></text:p>
      <text:p text:style-name="P60"><text:span text:style-name="T67">def on_message(client, userdata, msg):</text:span></text:p>
      <text:p text:style-name="P60"><text:span text:style-name="T67"><text:s text:c="4"/>print(f"[QoS 1] Mensaje recibido: {msg.payload.decode()}")</text:span></text:p>
      <text:p text:style-name="P60"><text:span text:style-name="T67"/></text:p>
      <text:p text:style-name="P60"><text:span text:style-name="T67">client = mqtt.Client(mqtt.CallbackAPIVersion.VERSION2, client_id="SubQoS1")</text:span></text:p>
      <text:p text:style-name="P60"><text:span text:style-name="T67">client.on_message = on_message</text:span></text:p>
      <text:p text:style-name="P60"><text:span text:style-name="T67"/></text:p>
      <text:p text:style-name="P60"><text:span text:style-name="T67">try:</text:span></text:p>
      <text:p text:style-name="P60"><text:span text:style-name="T67"><text:s text:c="4"/>client.connect(broker, 1883, 60)</text:span></text:p>
      <text:p text:style-name="P60"><text:span text:style-name="T67"><text:s text:c="4"/>client.subscribe(topic, qos=1)</text:span></text:p>
      <text:p text:style-name="P60"><text:span text:style-name="T67"><text:s text:c="4"/>client.loop_start()</text:span></text:p>
      <text:p text:style-name="P60"><text:span text:style-name="T67"><text:s text:c="4"/></text:span></text:p>
      <text:p text:style-name="P60"><text:span text:style-name="T67"><text:s text:c="4"/>input("Presiona Enter para finalizar el proceso del Suscriptor QoS 1...\n")</text:span></text:p>
      <text:p text:style-name="P60"><text:span text:style-name="T67"><text:s text:c="4"/></text:span></text:p>
      <text:p text:style-name="P60"><text:span text:style-name="T67">except KeyboardInterrupt:</text:span></text:p>
      <text:p text:style-name="P60"><text:span text:style-name="T67"><text:s text:c="4"/>pass</text:span></text:p>
      <text:p text:style-name="P60"><text:span text:style-name="T67">finally:</text:span></text:p>
      <text:p text:style-name="P60"><text:span text:style-name="T67"><text:s text:c="4"/>client.loop_stop()</text:span></text:p>
      <text:p text:style-name="P60"><text:span text:style-name="T67"><text:s text:c="4"/>client.disconnect()</text:span></text:p>
      <text:p text:style-name="P59"><text:span text:style-name="T61"/></text:p>
      <text:h text:style-name="P10" text:outline-level="5"><text:soft-page-break/><text:span text:style-name="T68">Características técnicas de QoS 1:</text:span></text:h>
      <text:list text:style-name="L4">
        <text:list-item>
          <text:p text:style-name="P39"><text:span text:style-name="T41">Garantía de entrega:</text:span> El broker asegura que el mensaje llegará al menos una vez al suscriptor.</text:p>
        </text:list-item>
        <text:list-item>
          <text:p text:style-name="P67"><text:span text:style-name="T71">Control por contrarrecibo:</text:span><text:span text:style-name="T70"> El publicador exige un ACK binario (</text:span><text:span text:style-name="Source_20_Text"><text:span text:style-name="T70">PUBACK</text:span></text:span><text:span text:style-name="T70">) del broker antes de liberar la memoria del mensaje.</text:span></text:p>
        </text:list-item>
        <text:list-item>
          <text:p text:style-name="P39"><text:span text:style-name="T41">Posibilidad de duplicados:</text:span> Puede llegar duplicado si hay fallos micro-temporales en los canales físicos de comunicación.</text:p>
        </text:list-item>
        <text:list-item>
          <text:p text:style-name="P39"><text:span text:style-name="T41">Aplicación industrial:</text:span> Recomendado para envío de telemetría de control, alarmas críticas y comandos de encendido/apagado.</text:p>
        </text:list-item>
      </text:list>
      <text:p text:style-name="P40"><text:span text:style-name="T45"/></text:p>
      <text:p text:style-name="P56"><text:span text:style-name="T16">Ejecución</text:span></text:p>
      <text:p text:style-name="P59"><text:span text:style-name="T61"/></text:p>
      <text:p text:style-name="P59"><draw:frame draw:style-name="fr13" draw:name="Imagen8" text:anchor-type="char" svg:x="3.695cm" svg:y="0.416cm" svg:width="10.664cm" svg:height="7.608cm" draw:z-index="8"><draw:image xlink:href="Pictures/100000000000055600000300FF263616.png" xlink:type="simple" xlink:show="embed" xlink:actuate="onLoad" draw:mime-type="image/png"/></draw:frame><text:span text:style-name="T61"/></text:p>
      <text:p text:style-name="P59"><text:span text:style-name="T61"/></text:p>
      <text:p text:style-name="P59"><text:span text:style-name="T61"/></text:p>
      <text:p text:style-name="P59"><text:span text:style-name="T61"/></text:p>
      <text:p text:style-name="P59"><text:span text:style-name="T61"><text:line-break/><text:line-break/><text:line-break/><text:line-break/><text:line-break/><text:line-break/><text:line-break/></text:span></text:p>
      <text:p text:style-name="P19" loext:marker-style-name="T11"><draw:frame draw:style-name="fr12" draw:name="Imagen9" text:anchor-type="char" svg:x="3.443cm" svg:y="0.349cm" svg:width="12.621cm" svg:height="4.734cm" draw:z-index="9"><draw:image xlink:href="Pictures/100000000000055600000300FF263616.png" xlink:type="simple" xlink:show="embed" xlink:actuate="onLoad" draw:mime-type="image/png"/></draw:frame><text:span text:style-name="T50"/></text:p>
      <text:p text:style-name="P19" loext:marker-style-name="T11"><text:span text:style-name="T50"/></text:p>
      <text:p text:style-name="P19" loext:marker-style-name="T11"><text:span text:style-name="T50"/></text:p>
      <text:p text:style-name="P19" loext:marker-style-name="T11"><text:span text:style-name="T50"/></text:p>
      <text:p text:style-name="P19" loext:marker-style-name="T11"><text:span text:style-name="T50"/></text:p>
      <text:p text:style-name="P19" loext:marker-style-name="T11"><text:span text:style-name="T50"/></text:p>
      <text:p text:style-name="P19" loext:marker-style-name="T11"><text:span text:style-name="T50"/></text:p>
      <text:p text:style-name="P27"><text:soft-page-break/><text:span text:style-name="T86">B. Q</text:span><text:span text:style-name="T85">oS </text:span><text:span text:style-name="T87">2</text:span><text:span text:style-name="T85"> – “</text:span><text:span text:style-name="T87">Exactly</text:span><text:span text:style-name="T85"> on</text:span><text:span text:style-name="T87">c</text:span><text:span text:style-name="T85">e” (</text:span><text:span text:style-name="T87">Exactamente </text:span><text:span text:style-name="T85">una vez)</text:span></text:p>
      <text:p text:style-name="P27"><text:span text:style-name="T85"><text:line-break/></text:span><text:span text:style-name="T82">Es el nivel más seguro y restrictivo del protocolo. Implementa un handshake de verificación bidireccional en cuatro fases separadas.</text:span><text:span text:style-name="T61"><text:line-break/></text:span></text:p>
      <text:p text:style-name="P27"><text:span text:style-name="T80">¿Qué debe de hacer est</text:span><text:span text:style-name="T81">e</text:span><text:span text:style-name="T80"> </text:span><text:span text:style-name="T81">ejemplo</text:span><text:span text:style-name="T80">?</text:span></text:p>
      <text:p text:style-name="P27"><text:span text:style-name="T80"/></text:p>
      <text:p text:style-name="P38"><text:span text:style-name="T44">Garantiza de forma matemática y lógica que el mensaje sea entregado exactamente una vez al flujo del programa receptor, bloqueando cualquier intento de duplicación de tramas por retransmisión de red.</text:span></text:p>
      <text:p text:style-name="P19" loext:marker-style-name="T11"><text:span text:style-name="T50"/></text:p>
      <text:list xml:id="list200542075999311" text:continue-list="list200541588527550" text:style-name="L1">
        <text:list-header>
          <text:p text:style-name="P22"><text:span text:style-name="T19">Adjunto Programa </text:span><text:span text:style-name="T20">y nombre de archivo</text:span><text:span text:style-name="T19">:</text:span></text:p>
        </text:list-header>
      </text:list>
      <text:p text:style-name="P97" loext:marker-style-name="T11"><text:span text:style-name="T52">P13/</text:span><text:span text:style-name="T54">3</text:span><text:span text:style-name="T52">/</text:span><text:span text:style-name="T54">publishe</text:span><text:span text:style-name="T51">r_</text:span><text:span text:style-name="T53">qos</text:span><text:span text:style-name="T55">2</text:span><text:span text:style-name="T50">.py </text:span><text:span text:style-name="T52">#Dentro del Raspberry Pi</text:span></text:p>
      <text:p text:style-name="P60"><text:span text:style-name="T67">import paho.mqtt.client as mqtt</text:span></text:p>
      <text:p text:style-name="P60"><text:span text:style-name="T67"/></text:p>
      <text:p text:style-name="P60"><text:span text:style-name="T67">broker = "10.42.0.117"</text:span></text:p>
      <text:p text:style-name="P60"><text:span text:style-name="T67">topic = "sala/gas"</text:span></text:p>
      <text:p text:style-name="P60"><text:span text:style-name="T67">mensaje = "Alerta: Nivel de gas elevado"</text:span></text:p>
      <text:p text:style-name="P60"><text:span text:style-name="T67"/></text:p>
      <text:p text:style-name="P60"><text:span text:style-name="T67">client = mqtt.Client(mqtt.CallbackAPIVersion.VERSION2, client_id="PubQoS2")</text:span></text:p>
      <text:p text:style-name="P60"><text:span text:style-name="T67"/></text:p>
      <text:p text:style-name="P60"><text:span text:style-name="T67">try:</text:span></text:p>
      <text:p text:style-name="P60"><text:span text:style-name="T67"><text:s text:c="4"/>client.connect(broker, 1883, 60)</text:span></text:p>
      <text:p text:style-name="P60"><text:span text:style-name="T67"><text:s text:c="4"/>client.loop_start()</text:span></text:p>
      <text:p text:style-name="P60"><text:span text:style-name="T67"><text:s text:c="4"/></text:span></text:p>
      <text:p text:style-name="P60"><text:span text:style-name="T67"><text:s text:c="4"/># Publicación con QoS 2 (Handshake de 4 pasos)</text:span></text:p>
      <text:p text:style-name="P60"><text:span text:style-name="T67"><text:s text:c="4"/>info = client.publish(topic, mensaje, qos=2)</text:span></text:p>
      <text:p text:style-name="P60"><text:span text:style-name="T67"><text:s text:c="4"/>info.wait_for_publish()</text:span></text:p>
      <text:p text:style-name="P60"><text:span text:style-name="T67"><text:s text:c="4"/></text:span></text:p>
      <text:p text:style-name="P60"><text:span text:style-name="T67"><text:s text:c="4"/>print(f"[QoS 2] Publicado con verificación estricta: {mensaje}")</text:span></text:p>
      <text:p text:style-name="P60"><text:span text:style-name="T67"><text:s text:c="4"/></text:span></text:p>
      <text:p text:style-name="P60"><text:span text:style-name="T67">except Exception as e:</text:span></text:p>
      <text:p text:style-name="P60"><text:soft-page-break/><text:span text:style-name="T67"><text:s text:c="4"/>print(f"Error: {e}")</text:span></text:p>
      <text:p text:style-name="P60"><text:span text:style-name="T67">finally:</text:span></text:p>
      <text:p text:style-name="P60"><text:span text:style-name="T67"><text:s text:c="4"/>client.loop_stop()</text:span></text:p>
      <text:p text:style-name="P60"><text:span text:style-name="T67"><text:s text:c="4"/>client.disconnect()</text:span></text:p>
      <text:p text:style-name="P19" loext:marker-style-name="T11"><text:span text:style-name="T50"/></text:p>
      <text:p text:style-name="P97" loext:marker-style-name="T11"><text:span text:style-name="T55">mosquito</text:span><text:span text:style-name="T52">/</text:span><text:span text:style-name="T54">3/subscriber_qos</text:span><text:span text:style-name="T55">2</text:span><text:span text:style-name="T54">.py</text:span><text:span text:style-name="T50"> </text:span><text:span text:style-name="T52">#Dentro de </text:span><text:span text:style-name="T55">la Terminal</text:span></text:p>
      <text:p text:style-name="P68"><text:span text:style-name="T59">import paho.mqtt.client as mqtt</text:span></text:p>
      <text:p text:style-name="P68"><text:span text:style-name="T59">broker = "10.42.0.117"</text:span></text:p>
      <text:p text:style-name="P68"><text:span text:style-name="T59">topic = "sala/gas"</text:span></text:p>
      <text:p text:style-name="P68"><text:span text:style-name="T59"/></text:p>
      <text:p text:style-name="P68"><text:span text:style-name="T59">def on_message(client, userdata, msg):</text:span></text:p>
      <text:p text:style-name="P68"><text:span text:style-name="T59"><text:s text:c="4"/>print(f"[QoS 2] Mensaje recibido sin posibilidad de duplicación: {msg.payload.decode()}")</text:span></text:p>
      <text:p text:style-name="P68"><text:span text:style-name="T59"/></text:p>
      <text:p text:style-name="P68"><text:span text:style-name="T59">client = mqtt.Client(mqtt.CallbackAPIVersion.VERSION2, client_id="SubQoS2")</text:span></text:p>
      <text:p text:style-name="P68"><text:span text:style-name="T59">client.on_message = on_message</text:span></text:p>
      <text:p text:style-name="P68"><text:span text:style-name="T59"/></text:p>
      <text:p text:style-name="P68"><text:span text:style-name="T59">try:</text:span></text:p>
      <text:p text:style-name="P68"><text:span text:style-name="T59"><text:s text:c="4"/>client.connect(broker, 1883, 60)</text:span></text:p>
      <text:p text:style-name="P68"><text:span text:style-name="T59"><text:s text:c="4"/>client.subscribe(topic, qos=2)</text:span></text:p>
      <text:p text:style-name="P68"><text:span text:style-name="T59"><text:s text:c="4"/>client.loop_start()</text:span></text:p>
      <text:p text:style-name="P68"><text:span text:style-name="T59"><text:s text:c="4"/></text:span></text:p>
      <text:p text:style-name="P68"><text:span text:style-name="T59"><text:s text:c="4"/>input("Presiona Enter para finalizar el proceso del Suscriptor QoS 2...\n")</text:span></text:p>
      <text:p text:style-name="P68"><text:span text:style-name="T59"><text:s text:c="4"/></text:span></text:p>
      <text:p text:style-name="P68"><text:span text:style-name="T59">except KeyboardInterrupt:</text:span></text:p>
      <text:p text:style-name="P68"><text:span text:style-name="T59"><text:s text:c="4"/>pass</text:span></text:p>
      <text:p text:style-name="P68"><text:span text:style-name="T59">finally:</text:span></text:p>
      <text:p text:style-name="P68"><text:span text:style-name="T59"><text:s text:c="4"/>client.loop_stop()</text:span></text:p>
      <text:p text:style-name="P68"><text:span text:style-name="T59"><text:s text:c="4"/>client.disconnect()</text:span></text:p>
      <text:p text:style-name="P56"><text:soft-page-break/><text:span text:style-name="T16">Ejecución</text:span></text:p>
      <text:p text:style-name="P19" loext:marker-style-name="T11"><draw:frame draw:style-name="fr11" draw:name="Imagen10" text:anchor-type="char" svg:x="1.071cm" svg:y="0.265cm" svg:width="15.012cm" svg:height="4.161cm" draw:z-index="10"><draw:image xlink:href="Pictures/100000000000055600000300DE7EFF04.png" xlink:type="simple" xlink:show="embed" xlink:actuate="onLoad" draw:mime-type="image/png"/></draw:frame><text:span text:style-name="T50"/></text:p>
      <text:p text:style-name="P19" loext:marker-style-name="T11"><text:span text:style-name="T50"/></text:p>
      <text:p text:style-name="P19" loext:marker-style-name="T11"><draw:frame draw:style-name="fr10" draw:name="Imagen11" text:anchor-type="char" svg:x="1.184cm" svg:y="0.307cm" svg:width="15.415cm" svg:height="4.807cm" draw:z-index="11"><draw:image xlink:href="Pictures/100000000000055600000300DE7EFF04.png" xlink:type="simple" xlink:show="embed" xlink:actuate="onLoad" draw:mime-type="image/png"/></draw:frame><text:span text:style-name="T50"/></text:p>
      <text:h text:style-name="P11" text:outline-level="5" loext:marker-style-name="T11"><text:span text:style-name="T40">Características técnicas de QoS 2:</text:span></text:h>
      <text:list text:style-name="L5">
        <text:list-item>
          <text:p text:style-name="P43"><text:span text:style-name="T41">Entrega exacta:</text:span> Asegura de forma matemática la llegada de una única instancia del dato al sistema operativo.</text:p>
        </text:list-item>
        <text:list-item>
          <text:p text:style-name="P72"><text:span text:style-name="T71">Handshake cuádruple:</text:span><text:span text:style-name="T70"> Emplea una secuencia estricta de control de paquetes a nivel de capa de aplicación: </text:span><text:span text:style-name="Source_20_Text"><text:span text:style-name="T70">PUBLISH</text:span></text:span><text:span text:style-name="T70"> $\rightarrow$ </text:span><text:span text:style-name="Source_20_Text"><text:span text:style-name="T70">PUBREC</text:span></text:span><text:span text:style-name="T70"> $\rightarrow$ </text:span><text:span text:style-name="Source_20_Text"><text:span text:style-name="T70">PUBREL</text:span></text:span><text:span text:style-name="T70"> $\rightarrow$ </text:span><text:span text:style-name="Source_20_Text"><text:span text:style-name="T70">PUBCOMP</text:span></text:span><text:span text:style-name="T70">.</text:span></text:p>
        </text:list-item>
        <text:list-item>
          <text:p text:style-name="P43"><text:span text:style-name="T41">Sobrecarga de cómputo:</text:span> Exige un consumo superior de ancho de banda en la red y mayor latencia de procesamiento en los hilos del CPU.</text:p>
        </text:list-item>
        <text:list-item>
          <text:p text:style-name="P43"><text:span text:style-name="T41">Aplicación industrial:</text:span> Diseñado exclusivamente para transacciones monetarias, pasarelas de pago, sistemas de automatización de misiones críticas o activación de válvulas de alivio en control de plantas químicas.</text:p>
        </text:list-item>
      </text:list>
      <text:p text:style-name="P18" loext:marker-style-name="T11"><text:span text:style-name="T50"/></text:p>
      <text:p text:style-name="P17" loext:marker-style-name="T11"><text:soft-page-break/><text:span text:style-name="T4"/></text:p>
      <text:p text:style-name="P74"><text:span text:style-name="T33">PERSISTENCIA DE MENSAJES EN CASO DE FALLO DE CONEXIÓN</text:span></text:p>
      <text:p text:style-name="P45"><text:span text:style-name="T96">Esta sección del documento aborda dos de los conceptos más avanzados y cruciales en las arquitecturas de comunicación distribuidas para el Internet de las Cosas (IoT): el mecanismo de negociación en 4 pasos de QoS 2 y las estrategias de persistencia híbrida (en el lado del publicador y del suscriptor) ante fallas críticas de conectividad física.</text:span></text:p>
      <text:h text:style-name="P8" text:outline-level="4">¿Qué debe de hacer esta práctica?</text:h>
      <text:p text:style-name="P44">A diferencia de los flujos convencionales, este módulo implementa un entorno robusto con tolerancia a fallos totales de red, dividiendo sus responsabilidades de la siguiente manera:</text:p>
      <text:list text:style-name="L6">
        <text:list-item>
          <text:p text:style-name="P73"><text:span text:style-name="T71">El Protocolo de 4 Pasos (QoS 2):</text:span><text:span text:style-name="T70"> Garantiza de forma matemática y estricta que un mensaje sea entregado exactamente una vez. Evita la duplicación de tramas mediante un doble bloqueo de identificadores (</text:span><text:span text:style-name="Source_20_Text"><text:span text:style-name="T70">PUBLISH</text:span></text:span><text:span text:style-name="T70"> $\rightarrow$ </text:span><text:span text:style-name="Source_20_Text"><text:span text:style-name="T70">PUBREC</text:span></text:span><text:span text:style-name="T70"> $\rightarrow$ </text:span><text:span text:style-name="Source_20_Text"><text:span text:style-name="T70">PUBREL</text:span></text:span><text:span text:style-name="T70"> $\rightarrow$ </text:span><text:span text:style-name="Source_20_Text"><text:span text:style-name="T70">PUBCOMP</text:span></text:span><text:span text:style-name="T70">), ideal para sistemas de misión crítica o control industrial.</text:span></text:p>
        </text:list-item>
        <text:list-item>
          <text:p text:style-name="P73"><text:span text:style-name="T71">La Persistencia en el Publicador (Cola Local en RAM):</text:span><text:span text:style-name="T70"> Resuelve el problema de la pérdida de datos cuando la Raspberry Pi pierde la conexión con el broker. El script detecta el estado mediante </text:span><text:span text:style-name="Source_20_Text"><text:span text:style-name="T70">client.is_connected()</text:span></text:span><text:span text:style-name="T70">. Si el enlace cae, desvía las lecturas del sensor hacia una estructura de datos en memoria ordenada bajo el modelo </text:span><text:span text:style-name="T71">FIFO</text:span><text:span text:style-name="T70"> (</text:span><text:span text:style-name="Source_20_Text"><text:span text:style-name="T70">queue.Queue</text:span></text:span><text:span text:style-name="T70">). Al restablecerse el canal, vacía de forma automática la cola local transmitiendo los históricos en el orden secuencial correcto.</text:span></text:p>
        </text:list-item>
        <text:list-item>
          <text:p text:style-name="P73"><text:span text:style-name="T71">La Persistencia en el Suscriptor (Sesiones Offline):</text:span><text:span text:style-name="T70"> Configura al recolector central con la bandera </text:span><text:span text:style-name="Source_20_Text"><text:span text:style-name="T70">clean_session=False</text:span></text:span><text:span text:style-name="T70">. Esto le ordena al broker mantener un registro de almacenamiento físico exclusivo para su ID, acumulando los mensajes que se publiquen mientras el script receptor se encuentre apagado o en mantenimiento.</text:span></text:p>
        </text:list-item>
      </text:list>
      <text:p text:style-name="P41"><text:span text:style-name="T93"/></text:p>
      <text:p text:style-name="P61"><text:span text:style-name="T4"/></text:p>
      <text:p text:style-name="P61"><text:span text:style-name="T4"/></text:p>
      <text:p text:style-name="P61"><text:span text:style-name="T4"/></text:p>
      <text:p text:style-name="P61"><text:span text:style-name="T4"/></text:p>
      <text:p text:style-name="P61"><text:soft-page-break/><text:span text:style-name="T4"/></text:p>
      <text:list xml:id="list200542461837664" text:continue-list="list200542075999311" text:style-name="L1">
        <text:list-header>
          <text:p text:style-name="P23"><text:span text:style-name="T19">Adjunto Programa </text:span><text:span text:style-name="T20">y nombre de archivo</text:span><text:span text:style-name="T19">:</text:span></text:p>
        </text:list-header>
      </text:list>
      <text:p text:style-name="P98" loext:marker-style-name="T11"><text:span text:style-name="T52">P13/</text:span><text:span text:style-name="T56">4</text:span><text:span text:style-name="T52">/</text:span><text:span text:style-name="T56">s</text:span><text:span text:style-name="T54">e</text:span><text:span text:style-name="T56">nso</text:span><text:span text:style-name="T51">r_</text:span><text:span text:style-name="T56">persistente</text:span><text:span text:style-name="T50">.py </text:span><text:span text:style-name="T52">#Dentro del Raspberry Pi</text:span></text:p>
      <text:p text:style-name="P62"><text:span text:style-name="T67">import paho.mqtt.client as mqtt</text:span></text:p>
      <text:p text:style-name="P62"><text:span text:style-name="T67">from queue import Queue</text:span></text:p>
      <text:p text:style-name="P62"><text:span text:style-name="T67">import time</text:span></text:p>
      <text:p text:style-name="P62"><text:span text:style-name="T67">import random</text:span></text:p>
      <text:p text:style-name="P62"><text:span text:style-name="T67"/></text:p>
      <text:p text:style-name="P62"><text:span text:style-name="T67">broker = "10.42.0.117" <text:s/># IP estática de la Raspberry Pi</text:span></text:p>
      <text:p text:style-name="P62"><text:span text:style-name="T67">topic = "sensores/datos"</text:span></text:p>
      <text:p text:style-name="P62"><text:span text:style-name="T67"/></text:p>
      <text:p text:style-name="P62"><text:span text:style-name="T67">mensaje_queue = Queue()</text:span></text:p>
      <text:p text:style-name="P62"><text:span text:style-name="T67"/></text:p>
      <text:p text:style-name="P62"><text:span text:style-name="T67">client = mqtt.Client(mqtt.CallbackAPIVersion.VERSION2, client_id="PublicadorPersistente")</text:span></text:p>
      <text:p text:style-name="P62"><text:span text:style-name="T67"/></text:p>
      <text:p text:style-name="P62"><text:span text:style-name="T67">def on_connect(client, userdata, flags, rc, properties=None):</text:span></text:p>
      <text:p text:style-name="P62"><text:span text:style-name="T67"><text:s text:c="4"/>print("¡Conectado exitosamente al broker!")</text:span></text:p>
      <text:p text:style-name="P62"><text:span text:style-name="T67"><text:s text:c="4"/>while not mensaje_queue.empty():</text:span></text:p>
      <text:p text:style-name="P62"><text:span text:style-name="T67"><text:s text:c="8"/>mensaje_pendiente = mensaje_queue.get()</text:span></text:p>
      <text:p text:style-name="P62"><text:span text:style-name="T67"><text:s text:c="8"/>client.publish(topic, mensaje_pendiente, qos=1)</text:span></text:p>
      <text:p text:style-name="P62"><text:span text:style-name="T67"><text:s text:c="8"/>print(f"📦 Enviado desde la cola local: {mensaje_pendiente}")</text:span></text:p>
      <text:p text:style-name="P62"><text:span text:style-name="T67"/></text:p>
      <text:p text:style-name="P62"><text:span text:style-name="T67">def on_disconnect(client, userdata, disconnect_flags, rc, properties=None):</text:span></text:p>
      <text:p text:style-name="P62"><text:span text:style-name="T67"><text:s text:c="4"/>print("🔴 Desconectado del broker. Activando almacenamiento local en RAM...")</text:span></text:p>
      <text:p text:style-name="P62"><text:span text:style-name="T67"/></text:p>
      <text:p text:style-name="P62"><text:span text:style-name="T67">client.on_connect = on_connect</text:span></text:p>
      <text:p text:style-name="P62"><text:span text:style-name="T67">client.on_disconnect = on_disconnect</text:span></text:p>
      <text:p text:style-name="P62"><text:span text:style-name="T67"/></text:p>
      <text:p text:style-name="P62"><text:soft-page-break/><text:span text:style-name="T67">client.connect_async(broker, 1883, 60)</text:span></text:p>
      <text:p text:style-name="P62"><text:span text:style-name="T67">client.loop_start()</text:span></text:p>
      <text:p text:style-name="P62"><text:span text:style-name="T67"/></text:p>
      <text:p text:style-name="P62"><text:span text:style-name="T67">try:</text:span></text:p>
      <text:p text:style-name="P62"><text:span text:style-name="T67"><text:s text:c="4"/>print(f"Iniciando monitoreo. Publicando en '{topic}'...")</text:span></text:p>
      <text:p text:style-name="P62"><text:span text:style-name="T67"><text:s text:c="4"/>while True:</text:span></text:p>
      <text:p text:style-name="P62"><text:span text:style-name="T67"><text:s text:c="8"/>temp = round(random.uniform(20.0, 30.0), 2)</text:span></text:p>
      <text:p text:style-name="P62"><text:span text:style-name="T67"><text:s text:c="8"/>mensaje = f"Temp: {temp} °C"</text:span></text:p>
      <text:p text:style-name="P62"><text:span text:style-name="T67"><text:s text:c="8"/></text:span></text:p>
      <text:p text:style-name="P62"><text:span text:style-name="T67"><text:s text:c="8"/>if client.is_connected():</text:span></text:p>
      <text:p text:style-name="P62"><text:span text:style-name="T67"><text:s text:c="12"/>client.publish(topic, mensaje, qos=1)</text:span></text:p>
      <text:p text:style-name="P62"><text:span text:style-name="T67"><text:s text:c="12"/>print(f"🚀 Publicado en tiempo real: {mensaje}")</text:span></text:p>
      <text:p text:style-name="P62"><text:span text:style-name="T67"><text:s text:c="8"/>else:</text:span></text:p>
      <text:p text:style-name="P62"><text:span text:style-name="T67"><text:s text:c="12"/>mensaje_queue.put(mensaje)</text:span></text:p>
      <text:p text:style-name="P62"><text:span text:style-name="T67"><text:s text:c="12"/>print(f"⚠️ Red caída. Guardado en cola local (Total: {mensaje_queue.qsize()}): {mensaje}")</text:span></text:p>
      <text:p text:style-name="P62"><text:span text:style-name="T67"><text:s text:c="12"/></text:span></text:p>
      <text:p text:style-name="P62"><text:span text:style-name="T67"><text:s text:c="8"/>time.sleep(2)</text:span></text:p>
      <text:p text:style-name="P62"><text:span text:style-name="T67">except KeyboardInterrupt:</text:span></text:p>
      <text:p text:style-name="P62"><text:span text:style-name="T67"><text:s text:c="4"/>print("\nPublicador finalizado por el usuario.")</text:span></text:p>
      <text:p text:style-name="P62"><text:span text:style-name="T67">finally:</text:span></text:p>
      <text:p text:style-name="P62"><text:span text:style-name="T67"><text:s text:c="4"/>client.loop_stop()</text:span></text:p>
      <text:p text:style-name="P62"><text:span text:style-name="T67"><text:s text:c="4"/>client.disconnect()</text:span></text:p>
      <text:p text:style-name="P62"><text:line-break/><text:span text:style-name="T55">mosquito</text:span><text:span text:style-name="T52">/</text:span><text:span text:style-name="T56">4</text:span><text:span text:style-name="T54">/</text:span><text:span text:style-name="T56">recolector</text:span><text:span text:style-name="T54">_</text:span><text:span text:style-name="T56">persistente</text:span><text:span text:style-name="T54">.py</text:span><text:span text:style-name="T50"> </text:span><text:span text:style-name="T52">#Dentro de </text:span><text:span text:style-name="T55">la Terminal</text:span></text:p>
      <text:p text:style-name="P69"><text:span text:style-name="T59">import paho.mqtt.client as mqtt</text:span></text:p>
      <text:p text:style-name="P69"><text:span text:style-name="T59"/></text:p>
      <text:p text:style-name="P69"><text:span text:style-name="T59">broker_ip = "10.42.0.117" </text:span></text:p>
      <text:p text:style-name="P69"><text:span text:style-name="T59">topic = "sensores/datos"</text:span></text:p>
      <text:p text:style-name="P69"><text:span text:style-name="T59"/></text:p>
      <text:p text:style-name="P69"><text:span text:style-name="T59">def on_message(client, userdata, msg):</text:span></text:p>
      <text:p text:style-name="P69"><text:soft-page-break/><text:span text:style-name="T59"><text:s text:c="4"/>print(f"📥 Mensaje recibido: {msg.payload.decode()} [QoS: {msg.qos}]")</text:span></text:p>
      <text:p text:style-name="P69"><text:span text:style-name="T59">client = mqtt.Client(</text:span></text:p>
      <text:p text:style-name="P69"><text:span text:style-name="T59"><text:s text:c="4"/>callback_api_version=mqtt.CallbackAPIVersion.VERSION2, </text:span></text:p>
      <text:p text:style-name="P69"><text:span text:style-name="T59"><text:s text:c="4"/>client_id="RecolectorPersistente", </text:span></text:p>
      <text:p text:style-name="P69"><text:span text:style-name="T59"><text:s text:c="4"/>clean_session=False <text:s/></text:span></text:p>
      <text:p text:style-name="P69"><text:span text:style-name="T59">)</text:span></text:p>
      <text:p text:style-name="P69"><text:span text:style-name="T59">client.on_message = on_message</text:span></text:p>
      <text:p text:style-name="P69"><text:span text:style-name="T59"/></text:p>
      <text:p text:style-name="P69"><text:span text:style-name="T59">try:</text:span></text:p>
      <text:p text:style-name="P69"><text:span text:style-name="T59"><text:s text:c="4"/>print(f"Conectando de forma persistente al broker {broker_ip}...")</text:span></text:p>
      <text:p text:style-name="P69"><text:span text:style-name="T59"><text:s text:c="4"/>client.connect(broker_ip, 1883, 60)</text:span></text:p>
      <text:p text:style-name="P69"><text:span text:style-name="T59"><text:s text:c="4"/></text:span></text:p>
      <text:p text:style-name="P69"><text:span text:style-name="T59"><text:s text:c="4"/>client.subscribe(topic, qos=1)</text:span></text:p>
      <text:p text:style-name="P69"><text:span text:style-name="T59"><text:s text:c="4"/>print(f"Suscrito a '{topic}'. Escuchando de forma permanente...")</text:span></text:p>
      <text:p text:style-name="P69"><text:span text:style-name="T59"><text:s text:c="4"/></text:span></text:p>
      <text:p text:style-name="P69"><text:span text:style-name="T59"><text:s text:c="4"/>client.loop_forever()</text:span></text:p>
      <text:p text:style-name="P69"><text:span text:style-name="T59">except KeyboardInterrupt:</text:span></text:p>
      <text:p text:style-name="P69"><text:span text:style-name="T59"><text:s text:c="4"/>print("\nRecolector detenido de manera controlada.")</text:span></text:p>
      <text:p text:style-name="P69"><text:span text:style-name="T59">finally:</text:span></text:p>
      <text:p text:style-name="P69"><text:span text:style-name="T59"><text:s text:c="4"/>client.disconnect()</text:span></text:p>
      <text:p text:style-name="P69"><text:span text:style-name="T59"/></text:p>
      <text:p text:style-name="P62"><text:line-break/></text:p>
      <text:p text:style-name="P61"><text:span text:style-name="T4"/></text:p>
      <text:p text:style-name="P61"><text:span text:style-name="T4"/></text:p>
      <text:p text:style-name="P61"><text:span text:style-name="T4"/></text:p>
      <text:p text:style-name="P61"><text:span text:style-name="T4"/></text:p>
      <text:p text:style-name="P57"><text:soft-page-break/><text:span text:style-name="T16">Ejecución</text:span></text:p>
      <text:p text:style-name="P62"><draw:frame draw:style-name="fr9" draw:name="Imagen12" text:anchor-type="char" svg:x="-1.109cm" svg:y="0.716cm" svg:width="12.33cm" svg:height="11.359cm" draw:z-index="12"><draw:image xlink:href="Pictures/100000000000055600000300CB1B8BDC.png" xlink:type="simple" xlink:show="embed" xlink:actuate="onLoad" draw:mime-type="image/png"/></draw:frame><text:span text:style-name="T16"/></text:p>
      <text:p text:style-name="P61"><text:span text:style-name="T4"/></text:p>
      <text:p text:style-name="P61"><draw:frame draw:style-name="fr8" draw:name="Imagen12 Copia 1" text:anchor-type="char" svg:x="6.922cm" svg:y="-0.194cm" svg:width="11.823cm" svg:height="11.606cm" draw:z-index="13"><draw:image xlink:href="Pictures/100000000000055600000300CB1B8BDC.png" xlink:type="simple" xlink:show="embed" xlink:actuate="onLoad" draw:mime-type="image/png"/></draw:frame><text:span text:style-name="T4"/></text:p>
      <text:p text:style-name="P61"><text:span text:style-name="T4"/></text:p>
      <text:p text:style-name="P61"><text:span text:style-name="T4"/></text:p>
      <text:p text:style-name="P75"><text:span text:style-name="T4">E</text:span><text:span text:style-name="T3">n otra terminal entramos al raspberry pi, ejecutaremos sudo systemctl stop mosquito (en la terminal donde se ejecuto el código aún debe estar corriendo):</text:span></text:p>
      <text:p text:style-name="P61"><text:span text:style-name="T4"/></text:p>
      <text:p text:style-name="P61"><text:span text:style-name="T4"/></text:p>
      <text:p text:style-name="P61"><draw:frame draw:style-name="fr7" draw:name="Imagen13" text:anchor-type="char" svg:x="1.207cm" svg:y="-1.965cm" svg:width="14.631cm" svg:height="15.57cm" draw:z-index="14"><draw:image xlink:href="Pictures/100000000000055600000300C0C654FC.png" xlink:type="simple" xlink:show="embed" xlink:actuate="onLoad" draw:mime-type="image/png"/></draw:frame><draw:frame draw:style-name="fr6" draw:name="Imagen13 Copia 1" text:anchor-type="char" svg:x="4.034cm" svg:y="13.305cm" svg:width="10.744cm" svg:height="11.845cm" draw:z-index="15"><draw:image xlink:href="Pictures/100000000000055600000300C0C654FC.png" xlink:type="simple" xlink:show="embed" xlink:actuate="onLoad" draw:mime-type="image/png"/></draw:frame><text:soft-page-break/><text:span text:style-name="T4"/></text:p>
      <text:p text:style-name="P61"><text:span text:style-name="T4"/></text:p>
      <text:p text:style-name="P61"><text:span text:style-name="T4"/></text:p>
      <text:p text:style-name="P61"><text:span text:style-name="T4"/></text:p>
      <text:p text:style-name="P61"><text:span text:style-name="T4"/></text:p>
      <text:p text:style-name="P61"><text:span text:style-name="T4"/></text:p>
      <text:p text:style-name="P61"><text:span text:style-name="T4"/></text:p>
      <text:p text:style-name="P61"><text:span text:style-name="T4"/></text:p>
      <text:p text:style-name="P61"><text:soft-page-break/><text:span text:style-name="T4"/></text:p>
      <text:p text:style-name="P76"><text:span text:style-name="T4">Y </text:span><text:span text:style-name="T3">al ejecutar en la misma terminal que se le dio el stop sudo systemctl start mosquitto, volvera a su estabilidad y enviara de golpe los que se tenian almacenados:</text:span></text:p>
      <text:p text:style-name="P61"><text:span text:style-name="T4"/></text:p>
      <text:p text:style-name="P61"><draw:frame draw:style-name="fr1" draw:name="Imagen1" text:anchor-type="char" svg:width="19.59cm" svg:height="11.012cm" draw:z-index="16"><draw:image xlink:href="Pictures/10000000000005560000030073E99F21.png" xlink:type="simple" xlink:show="embed" xlink:actuate="onLoad" draw:mime-type="image/png"/></draw:frame><text:span text:style-name="T4"/></text:p>
      <text:p text:style-name="P61"><text:span text:style-name="T4"/></text:p>
      <text:p text:style-name="P61"><text:span text:style-name="T4"/></text:p>
      <text:p text:style-name="P61"><text:span text:style-name="T4"/></text:p>
      <text:p text:style-name="P61"><text:span text:style-name="T4"/></text:p>
      <text:p text:style-name="P100" loext:marker-style-name="T11"><text:soft-page-break/><text:span text:style-name="T5">Pasos de configuración</text:span></text:p>
      <text:p text:style-name="P100" loext:marker-style-name="T11"><text:span text:style-name="T30"># 1. Sincronizar listas de paquetes e instalar el motor de estructuras de datos en memoria Redis:</text:span></text:p>
      <text:p text:style-name="P113" loext:marker-style-name="T11"><text:span text:style-name="T28">sudo apt update &amp;&amp; sudo apt install redis-server -y</text:span></text:p>
      <text:p text:style-name="P108" loext:marker-style-name="T11"><text:span text:style-name="T28"># 2. Instalar el conector oficial de Redis para el entorno de desarrollo de Python:</text:span></text:p>
      <text:p text:style-name="P113" loext:marker-style-name="T11"><text:span text:style-name="T28">pip3 install redis</text:span></text:p>
      <text:p text:style-name="P108" loext:marker-style-name="T11"><text:span text:style-name="T28"># 3. Validar el estado operativo local del demonio de almacenamiento mediante la interfaz CLI:</text:span></text:p>
      <text:p text:style-name="P113" loext:marker-style-name="T11"><text:span text:style-name="T28">redis-cli ping</text:span></text:p>
      <text:p text:style-name="P108" loext:marker-style-name="T11"><text:span text:style-name="T28"># (El servidor debe responder de manera síncrona con el token: PONG)</text:span></text:p>
      <text:h text:style-name="P2" text:outline-level="3"><text:span text:style-name="T14">Desarrollo de la Práctica</text:span></text:h>
      <text:p text:style-name="Text_20_body"><text:span text:style-name="T70">Esta sección del documento aborda la implementación de una arquitectura de mensajería asíncrona basada en el motor de estructuras de datos en memoria </text:span><text:span text:style-name="T71">Redis</text:span><text:span text:style-name="T70">. En este módulo se prescinde temporalmente del protocolo MQTT para introducir un paradigma de persistencia de datos basado en estructuras distribuidas de listas </text:span><text:span text:style-name="T71">FIFO (First In, First Out)</text:span><text:span text:style-name="T70">.</text:span></text:p>
      <text:h text:style-name="P6" text:outline-level="4"><text:span text:style-name="T95">¿Qué debe de hacer esta práctica?</text:span></text:h>
      <text:p text:style-name="P32">El objetivo primordial de esta sección es construir e integrar un canal desacoplado de comunicación punto a punto de alta velocidad, dividiendo las responsabilidades operativas en tres componentes esenciales:</text:p>
      <text:list text:style-name="L7">
        <text:list-item>
          <text:p text:style-name="P77"><text:span text:style-name="T71">El Servidor (Redis en la Raspberry Pi):</text:span><text:span text:style-name="T70"> Actúa como un contenedor y administrador central de memoria. Aloja una lista estructurada bajo la llave </text:span><text:span text:style-name="Source_20_Text"><text:span text:style-name="T70">"cola:temperatura"</text:span></text:span><text:span text:style-name="T70">. Al tener habilitadas las directivas de persistencia híbrida en disco (</text:span><text:span text:style-name="T71">RDB</text:span><text:span text:style-name="T70"> y </text:span><text:span text:style-name="T71">AOF</text:span><text:span text:style-name="T70">), resguarda de forma física cada transacción para evitar pérdidas ante cortes de energía.</text:span></text:p>
        </text:list-item>
        <text:list-item>
          <text:p text:style-name="P77"><text:soft-page-break/><text:span text:style-name="T71">El Publicador / Productor (</text:span><text:span text:style-name="Source_20_Text"><text:span text:style-name="T71">publicador_redis.py</text:span></text:span><text:span text:style-name="T71">):</text:span><text:span text:style-name="T70"> Simula un nodo de adquisición de datos montado en la Raspberry Pi. Genera una lectura cada 5 segundos y utiliza la operación primitiva </text:span><text:span text:style-name="Source_20_Text"><text:span text:style-name="T70">RPUSH</text:span></text:span><text:span text:style-name="T70"> (Right Push) para inyectar la carga útil de manera secuencial al final de la lista.</text:span></text:p>
        </text:list-item>
        <text:list-item>
          <text:p text:style-name="P77"><text:span text:style-name="T71">El Suscriptor / Consumidor (</text:span><text:span text:style-name="Source_20_Text"><text:span text:style-name="T71">subscriptor_redis.py</text:span></text:span><text:span text:style-name="T71">):</text:span><text:span text:style-name="T70"> Se ejecuta en la PC con Linux y se conecta remotamente a la Raspberry Pi. Utiliza la operación bloqueante </text:span><text:span text:style-name="Source_20_Text"><text:span text:style-name="T70">BLPOP</text:span></text:span><text:span text:style-name="T70"> (Blocking Left Pop) para extraer el elemento más antiguo de la lista. Si la estructura está vacía, el proceso se suspende de forma pasiva liberando ciclos de CPU.</text:span></text:p>
        </text:list-item>
      </text:list>
      <text:h text:style-name="P9" text:outline-level="4"><text:s/><text:span text:style-name="T41">¿Qué diferencia se tiene frente a MQTT?</text:span></text:h>
      <text:list text:style-name="L8">
        <text:list-item>
          <text:p text:style-name="P78"><text:span text:style-name="T71">Destrucción de datos por extracción:</text:span><text:span text:style-name="T70"> En la arquitectura Publish/Subscribe de MQTT, el Broker genera una réplica del mensaje para cada cliente suscrito a un tópico. En las listas de Redis, la lectura a través de </text:span><text:span text:style-name="Source_20_Text"><text:span text:style-name="T70">BLPOP</text:span></text:span><text:span text:style-name="T70"> es de carácter destructivo: el consumidor remueve el dato de la estructura de forma definitiva. Si múltiples consumidores escuchan la misma cola, los mensajes se distribuyen de forma balanceada y exclusiva entre ellos.</text:span></text:p>
        </text:list-item>
        <text:list-item>
          <text:p text:style-name="P78"><text:span text:style-name="T71">Persistencia nativa por diseño:</text:span><text:span text:style-name="T70"> Mientras que MQTT requiere gestionar acuses de recibo (QoS 1 o 2), IDs fijos y banderas de control de sesión limpia (</text:span><text:span text:style-name="Source_20_Text"><text:span text:style-name="T70">clean_session=False</text:span></text:span><text:span text:style-name="T70">), en Redis cualquier dato inyectado mediante </text:span><text:span text:style-name="Source_20_Text"><text:span text:style-name="T70">RPUSH</text:span></text:span><text:span text:style-name="T70"> queda almacenado en memoria de forma inmediata por la naturaleza y diseño del motor de la base de datos.</text:span></text:p>
        </text:list-item>
      </text:list>
      <text:list xml:id="list200540979998723" text:continue-list="list200542461837664" text:style-name="L1">
        <text:list-header>
          <text:p text:style-name="P24"><text:span text:style-name="T19">Adjunto Programa </text:span><text:span text:style-name="T20">y nombre de archivo</text:span><text:span text:style-name="T19">:</text:span></text:p>
        </text:list-header>
      </text:list>
      <text:p text:style-name="P99" loext:marker-style-name="T11"><text:span text:style-name="T52">P13/</text:span><text:span text:style-name="T57">5</text:span><text:span text:style-name="T52">/publicador_redis.py</text:span><text:span text:style-name="T50"> </text:span><text:span text:style-name="T52">#Dentro del Raspberry Pi</text:span></text:p>
      <text:p text:style-name="P63"><text:span text:style-name="T67">import redis</text:span></text:p>
      <text:p text:style-name="P63"><text:span text:style-name="T67">import time</text:span></text:p>
      <text:p text:style-name="P63"><text:span text:style-name="T67">import random</text:span></text:p>
      <text:p text:style-name="P63"><text:span text:style-name="T67"/></text:p>
      <text:p text:style-name="P63"><text:span text:style-name="T67">r = redis.Redis(host='localhost', port=6379, db=0)</text:span></text:p>
      <text:p text:style-name="P63"><text:span text:style-name="T67"/></text:p>
      <text:p text:style-name="P63"><text:span text:style-name="T67">print("🚀 Productor de Redis iniciado. Insertando datos en la cola...")</text:span></text:p>
      <text:p text:style-name="P63"><text:span text:style-name="T67"/></text:p>
      <text:p text:style-name="P63"><text:span text:style-name="T67">try:</text:span></text:p>
      <text:p text:style-name="P63"><text:span text:style-name="T67"><text:s text:c="4"/>while True:</text:span></text:p>
      <text:p text:style-name="P63"><text:span text:style-name="T67"><text:s text:c="8"/>temp = round(random.uniform(20.0, 30.0), 2)</text:span></text:p>
      <text:p text:style-name="P63"><text:soft-page-break/><text:span text:style-name="T67"><text:s text:c="8"/>mensaje = f"Temperatura: {temp} °C"</text:span></text:p>
      <text:p text:style-name="P63"><text:span text:style-name="T67"><text:s text:c="8"/></text:span></text:p>
      <text:p text:style-name="P63"><text:span text:style-name="T67"><text:s text:c="8"/>r.rpush("cola:temperatura", mensaje)</text:span></text:p>
      <text:p text:style-name="P63"><text:span text:style-name="T67"><text:s text:c="8"/></text:span></text:p>
      <text:p text:style-name="P63"><text:span text:style-name="T67"><text:s text:c="8"/>print("📤 Encolado exitosamente:", mensaje)</text:span></text:p>
      <text:p text:style-name="P63"><text:span text:style-name="T67"><text:s text:c="8"/>time.sleep(5)</text:span></text:p>
      <text:p text:style-name="P63"><text:span text:style-name="T67"><text:s text:c="8"/></text:span></text:p>
      <text:p text:style-name="P63"><text:span text:style-name="T67">except KeyboardInterrupt:</text:span></text:p>
      <text:p text:style-name="P63"><text:span text:style-name="T67"><text:s text:c="4"/>print("\n🛑 Publicador detenido de forma voluntaria.")</text:span></text:p>
      <text:p text:style-name="P63"><text:span text:style-name="T67"/></text:p>
      <text:p text:style-name="P28"><text:span text:style-name="T55">mosquito</text:span><text:span text:style-name="T52">/</text:span><text:span text:style-name="T57">5</text:span><text:span text:style-name="T54">/subscriptor_redis.py</text:span><text:span text:style-name="T50"> </text:span><text:span text:style-name="T52">#Dentro de </text:span><text:span text:style-name="T55">la Terminal</text:span></text:p>
      <text:p text:style-name="P70"><text:span text:style-name="T59">import redis</text:span></text:p>
      <text:p text:style-name="P70"><text:span text:style-name="T59"/></text:p>
      <text:p text:style-name="P70"><text:span text:style-name="T59">broker_ip = "10.42.0.117"</text:span></text:p>
      <text:p text:style-name="P70"><text:span text:style-name="T59">r = redis.Redis(host=broker_ip, port=6379, db=0)</text:span></text:p>
      <text:p text:style-name="P70"><text:span text:style-name="T59"/></text:p>
      <text:p text:style-name="P70"><text:span text:style-name="T59">print(f"🕓 Conectado a Redis en {broker_ip}. Esperando mensajes en modo bloqueante (BLPOP)...")</text:span></text:p>
      <text:p text:style-name="P70"><text:span text:style-name="T59"/></text:p>
      <text:p text:style-name="P70"><text:span text:style-name="T59">try:</text:span></text:p>
      <text:p text:style-name="P70"><text:span text:style-name="T59"><text:s text:c="4"/>while True:</text:span></text:p>
      <text:p text:style-name="P70"><text:span text:style-name="T59"><text:s text:c="8"/>nombre_cola, mensaje = r.blpop("cola:temperatura")</text:span></text:p>
      <text:p text:style-name="P70"><text:span text:style-name="T59"><text:s text:c="8"/></text:span></text:p>
      <text:p text:style-name="P70"><text:span text:style-name="T59"><text:s text:c="8"/>print(f"📥 Mensaje recibido de [{nombre_cola.decode()}]: {mensaje.decode()}")</text:span></text:p>
      <text:p text:style-name="P70"><text:span text:style-name="T59"><text:s text:c="8"/></text:span></text:p>
      <text:p text:style-name="P70"><text:span text:style-name="T59">except KeyboardInterrupt:</text:span></text:p>
      <text:p text:style-name="P70"><text:span text:style-name="T59"><text:s text:c="4"/>print("\n🛑 Subscriptor detenido de forma voluntaria.")</text:span></text:p>
      <text:p text:style-name="P70"><text:span text:style-name="T59"/></text:p>
      <text:p text:style-name="P70"><text:span text:style-name="T59"/></text:p>
      <text:p text:style-name="P70"><text:span text:style-name="T59"/></text:p>
      <text:p text:style-name="P46"><text:soft-page-break/><text:span text:style-name="T94">Ejecución y Pruebas del Sistema</text:span></text:p>
      <text:p text:style-name="P48"><text:span text:style-name="T96">Para validar el desacoplamiento temporal y la resiliencia de las listas persistentes de Redis en red local, realice la siguiente secuencia de despliegue:</text:span></text:p>
      <text:h text:style-name="P4" text:outline-level="4"><text:span text:style-name="T14">Fase 1: Configuración del Enlace Remoto en el Servidor (Raspberry Pi)</text:span></text:h>
      <text:list xml:id="list3641742838" text:style-name="L9">
        <text:list-item>
          <text:p text:style-name="P50">Abra el archivo maestro de configuración de Redis en la Raspberry Pi:</text:p>
          <text:p text:style-name="P14"><text:span text:style-name="Source_20_Text">sudo nano /etc/redis/redis.conf</text:span></text:p>
        </text:list-item>
        <text:list-item>
          <text:p text:style-name="P79"><text:span text:style-name="T70">Modifique la directiva de enlace para permitir conexiones fuera de la interfaz local loopback, cambiando </text:span><text:span text:style-name="Source_20_Text"><text:span text:style-name="T70">bind 127.0.0.1 ::1</text:span></text:span><text:span text:style-name="T70"> por:</text:span></text:p>
          <text:p text:style-name="P14"><text:span text:style-name="Source_20_Text">bind 0.0.0.0</text:span></text:p>
        </text:list-item>
        <text:list-item>
          <text:p text:style-name="P79"><text:span text:style-name="T70">Desactive las restricciones iniciales de entorno modificando el estado de modo protegido (</text:span><text:span text:style-name="Source_20_Text"><text:span text:style-name="T70">protected-mode yes</text:span></text:span><text:span text:style-name="T70">) a:</text:span></text:p>
          <text:p text:style-name="P14"><text:span text:style-name="Source_20_Text">protected-mode no</text:span></text:p>
        </text:list-item>
        <text:list-item>
          <text:p text:style-name="P79"><text:span text:style-name="T70">Asegúrese de que las directivas de persistencia se encuentren descomentadas (</text:span><text:span text:style-name="Source_20_Text"><text:span text:style-name="T70">appendonly yes</text:span></text:span><text:span text:style-name="T70">). Guarde los cambios y reinicie el daemon del sistema:</text:span></text:p>
          <text:p text:style-name="P14"><text:span text:style-name="Source_20_Text">sudo systemctl restart redis-server</text:span></text:p>
        </text:list-item>
      </text:list>
      <text:p text:style-name="P61"><text:span text:style-name="T7"/></text:p>
      <text:p text:style-name="P61"><text:soft-page-break/><text:span text:style-name="T7">Anteriormente tuve un error pero los datos en el raspberry pi si los enviaba, y al momento de reparar ese error los envía:</text:span><text:span text:style-name="T4"><text:line-break/><text:line-break/></text:span><draw:frame draw:style-name="fr5" draw:name="Imagen14" text:anchor-type="char" svg:x="-0.065cm" svg:y="3.505cm" svg:width="17.59cm" svg:height="7.235cm" draw:z-index="17"><draw:image xlink:href="Pictures/10000001000002B3000002B952556E70.png" xlink:type="simple" xlink:show="embed" xlink:actuate="onLoad" draw:mime-type="image/png"/></draw:frame><draw:frame draw:style-name="fr4" draw:name="Imagen15" text:anchor-type="char" svg:x="-0.12cm" svg:y="11.924cm" svg:width="17.436cm" svg:height="10.014cm" draw:z-index="18"><draw:image xlink:href="Pictures/100000010000029300000297EA357996.png" xlink:type="simple" xlink:show="embed" xlink:actuate="onLoad" draw:mime-type="image/png"/></draw:frame></text:p>
      <text:p text:style-name="P81"><text:span text:style-name="T34"/></text:p>
      <text:p text:style-name="P100" loext:marker-style-name="T11"><text:soft-page-break/><text:span text:style-name="T5">Pasos de configuración</text:span></text:p>
      <text:p text:style-name="P109" loext:marker-style-name="T11"><text:span text:style-name="T28"># 1. Asegurar la instalación del motor de base de datos embebido SQLite3 en el sistema operativo:</text:span><text:span text:style-name="T29"> </text:span></text:p>
      <text:p text:style-name="P109" loext:marker-style-name="T11"><text:span text:style-name="T29">sudo apt update &amp;&amp; sudo apt install sqlite3 -y </text:span></text:p>
      <text:p text:style-name="P109" loext:marker-style-name="T11"><text:span text:style-name="T28"># 2. Instalar herramientas complementarias de manipulación de SQLite para el entorno de Python: </text:span></text:p>
      <text:p text:style-name="P114" loext:marker-style-name="T11"><text:span text:style-name="T28">pip3 install sqlite-utils </text:span></text:p>
      <text:p text:style-name="P109" loext:marker-style-name="T11"><text:span text:style-name="T28"># 3. Nota de arquitectura: El módulo 'sqlite3' viene integrado por defecto en la biblioteca estándar de Python, </text:span></text:p>
      <text:p text:style-name="P109" loext:marker-style-name="T11"><text:span text:style-name="T28"># por lo que no requiere llamadas adicionales al gestor de paquetes pip.</text:span></text:p>
      <text:h text:style-name="P3" text:outline-level="3"><text:span text:style-name="T14">Desarrollo de la Práctica</text:span></text:h>
      <text:p text:style-name="P83"><text:span text:style-name="T70">Esta sección del documento aborda la implementación de una alternativa local, ligera y de bajo consumo de recursos para simular una cola de mensajería estructurada. En lugar de desplegar un servidor dedicado orientado a red (como el broker Mosquitto de MQTT o el servidor distribuido de Redis), se utiliza un motor de base de datos relacional embebido: SQLite.</text:span></text:p>
      <text:h text:style-name="P7" text:outline-level="4"><text:span text:style-name="T14">¿Qué debe de hacer esta práctica?</text:span></text:h>
      <text:p text:style-name="Text_20_body"><text:span text:style-name="T70">El objetivo primordial de esta sección es modelar y simular de forma lógica el comportamiento de una cola </text:span><text:span text:style-name="T71">FIFO (First In, First Out)</text:span><text:span text:style-name="T70"> utilizando exclusivamente sentencias y transacciones del estándar SQL (</text:span><text:span text:style-name="Source_20_Text"><text:span text:style-name="T70">INSERT</text:span></text:span><text:span text:style-name="T70">, </text:span><text:span text:style-name="Source_20_Text"><text:span text:style-name="T70">SELECT</text:span></text:span><text:span text:style-name="T70"> y </text:span><text:span text:style-name="Source_20_Text"><text:span text:style-name="T70">DELETE</text:span></text:span><text:span text:style-name="T70">). Las responsabilidades del sistema se dividen en tres componentes:</text:span></text:p>
      <text:list text:style-name="L10">
        <text:list-item>
          <text:p text:style-name="P84"><text:span text:style-name="T71">La Base de Datos (</text:span><text:span text:style-name="Source_20_Text"><text:span text:style-name="T71">mensajes.db</text:span></text:span><text:span text:style-name="T71">):</text:span><text:span text:style-name="T70"> Actúa como el buffer y almacén temporal. Centraliza la información en una tabla estructurada llamada </text:span><text:span text:style-name="Source_20_Text"><text:span text:style-name="T70">cola</text:span></text:span><text:span text:style-name="T70">, provista de un índice numérico autoincrementable (</text:span><text:span text:style-name="Source_20_Text"><text:span text:style-name="T70">id AUTOINCREMENT</text:span></text:span><text:span text:style-name="T70">) que funge como la estampa de tiempo o prioridad.</text:span></text:p>
        </text:list-item>
        <text:list-item>
          <text:p text:style-name="P84"><text:soft-page-break/><text:span text:style-name="T71">El Publicador / Productor (</text:span><text:span text:style-name="Source_20_Text"><text:span text:style-name="T71">publicador_sqlite.py</text:span></text:span><text:span text:style-name="T71">):</text:span><text:span text:style-name="T70"> Modela el nodo de adquisición de telemetría. Genera una lectura aleatoria cada 5 segundos e inserta un nuevo registro al final de la tabla relacional utilizando la instrucción </text:span><text:span text:style-name="Source_20_Text"><text:span text:style-name="T70">INSERT INTO</text:span></text:span><text:span text:style-name="T70">.</text:span></text:p>
        </text:list-item>
        <text:list-item>
          <text:p text:style-name="P84"><text:span text:style-name="T71">El Suscriptor / Consumidor (</text:span><text:span text:style-name="Source_20_Text"><text:span text:style-name="T71">subscriptor_sqlite.py</text:span></text:span><text:span text:style-name="T71">):</text:span><text:span text:style-name="T70"> Realiza consultas de búsqueda cíclicas (</text:span><text:span text:style-name="T73">polling</text:span><text:span text:style-name="T70">). Extrae de forma secuencial únicamente el registro más antiguo (el ID más bajo en la tabla) mediante la instrucción </text:span><text:span text:style-name="Source_20_Text"><text:span text:style-name="T70">SELECT ... ORDER BY id ASC LIMIT 1</text:span></text:span><text:span text:style-name="T70">. Tras procesar e imprimir el dato en consola, ejecuta un comando </text:span><text:span text:style-name="Source_20_Text"><text:span text:style-name="T70">DELETE</text:span></text:span><text:span text:style-name="T70"> dirigido por ID para remover el mensaje de la base de datos, simulando la extracción destructiva de una cola de mensajes tradicional.</text:span></text:p>
        </text:list-item>
      </text:list>
      <text:p text:style-name="P42"><text:span text:style-name="T14"/></text:p>
      <text:list text:continue-list="list200540979998723" text:style-name="L1">
        <text:list-header>
          <text:p text:style-name="P25"><text:span text:style-name="T19">Adjunto Programa </text:span><text:span text:style-name="T20">y nombre de archivo</text:span><text:span text:style-name="T19">:</text:span></text:p>
        </text:list-header>
      </text:list>
      <text:p text:style-name="P100" loext:marker-style-name="T11"><text:span text:style-name="T52">P13/</text:span><text:span text:style-name="T58">6</text:span><text:span text:style-name="T52">/publicador_s</text:span><text:span text:style-name="T58">qlite</text:span><text:span text:style-name="T52">.py</text:span><text:span text:style-name="T50"> <text:s/></text:span><text:span text:style-name="T52">#Dentro del Raspberry Pi </text:span><text:span text:style-name="T58">y de la Terminal</text:span></text:p>
      <text:p text:style-name="P64"><text:span text:style-name="T67">import sqlite3</text:span></text:p>
      <text:p text:style-name="P64"><text:span text:style-name="T67">import time</text:span></text:p>
      <text:p text:style-name="P64"><text:span text:style-name="T67">import random</text:span></text:p>
      <text:p text:style-name="P64"><text:span text:style-name="T67"/></text:p>
      <text:p text:style-name="P64"><text:span text:style-name="T67">conn = sqlite3.connect("mensajes.db")</text:span></text:p>
      <text:p text:style-name="P64"><text:span text:style-name="T67">cursor = conn.cursor()</text:span></text:p>
      <text:p text:style-name="P64"><text:span text:style-name="T67"/></text:p>
      <text:p text:style-name="P64"><text:span text:style-name="T67">cursor.execute('''</text:span></text:p>
      <text:p text:style-name="P64"><text:span text:style-name="T67">CREATE TABLE IF NOT EXISTS cola (</text:span></text:p>
      <text:p text:style-name="P64"><text:span text:style-name="T67"><text:s text:c="4"/>id INTEGER PRIMARY KEY AUTOINCREMENT,</text:span></text:p>
      <text:p text:style-name="P64"><text:span text:style-name="T67"><text:s text:c="4"/>mensaje TEXT,</text:span></text:p>
      <text:p text:style-name="P64"><text:span text:style-name="T67"><text:s text:c="4"/>timestamp DATETIME DEFAULT CURRENT_TIMESTAMP</text:span></text:p>
      <text:p text:style-name="P64"><text:span text:style-name="T67">)</text:span></text:p>
      <text:p text:style-name="P64"><text:span text:style-name="T67">''')</text:span></text:p>
      <text:p text:style-name="P64"><text:span text:style-name="T67">conn.commit()</text:span></text:p>
      <text:p text:style-name="P64"><text:span text:style-name="T67"/></text:p>
      <text:p text:style-name="P64"><text:span text:style-name="T67">print("🚀 Publicador de SQLite iniciado. Insertando registros en 'mensajes.db'...")</text:span></text:p>
      <text:p text:style-name="P64"><text:span text:style-name="T67"/></text:p>
      <text:p text:style-name="P64"><text:soft-page-break/><text:span text:style-name="T67">try:</text:span></text:p>
      <text:p text:style-name="P64"><text:span text:style-name="T67"><text:s text:c="4"/>while True:</text:span></text:p>
      <text:p text:style-name="P64"><text:span text:style-name="T67"><text:s text:c="8"/>temp = round(random.uniform(20.0, 30.0), 2)</text:span></text:p>
      <text:p text:style-name="P64"><text:span text:style-name="T67"><text:s text:c="8"/>mensaje = f"Temperatura: {temp} °C"</text:span></text:p>
      <text:p text:style-name="P64"><text:span text:style-name="T67"><text:s text:c="8"/></text:span></text:p>
      <text:p text:style-name="P64"><text:span text:style-name="T67"><text:s text:c="8"/>cursor.execute("INSERT INTO cola (mensaje) VALUES (?)", (mensaje,))</text:span></text:p>
      <text:p text:style-name="P64"><text:span text:style-name="T67"><text:s text:c="8"/>conn.commit()</text:span></text:p>
      <text:p text:style-name="P64"><text:span text:style-name="T67"><text:s text:c="8"/></text:span></text:p>
      <text:p text:style-name="P64"><text:span text:style-name="T67"><text:s text:c="8"/>print(f"📤 Encolado en BD: {mensaje}")</text:span></text:p>
      <text:p text:style-name="P64"><text:span text:style-name="T67"><text:s text:c="8"/>time.sleep(5)</text:span></text:p>
      <text:p text:style-name="P64"><text:span text:style-name="T67"><text:s text:c="8"/></text:span></text:p>
      <text:p text:style-name="P64"><text:span text:style-name="T67">except KeyboardInterrupt:</text:span></text:p>
      <text:p text:style-name="P64"><text:span text:style-name="T67"><text:s text:c="4"/>print("\n🛑 Publicador detenido por el usuario.")</text:span></text:p>
      <text:p text:style-name="P64"><text:span text:style-name="T67">finally:</text:span></text:p>
      <text:p text:style-name="P64"><text:span text:style-name="T67"><text:s text:c="4"/>conn.close()</text:span></text:p>
      <text:p text:style-name="P64"><text:span text:style-name="T67"/></text:p>
      <text:p text:style-name="P29"><text:span text:style-name="T55">mosquito</text:span><text:span text:style-name="T52">/</text:span><text:span text:style-name="T58">6</text:span><text:span text:style-name="T54">/subscriptor_s</text:span><text:span text:style-name="T58">qlite</text:span><text:span text:style-name="T54">.py</text:span><text:span text:style-name="T50"> </text:span><text:span text:style-name="T52">#Dentro de </text:span><text:span text:style-name="T55">la Terminal</text:span></text:p>
      <text:p text:style-name="P71"><text:span text:style-name="T59">import sqlite3</text:span></text:p>
      <text:p text:style-name="P71"><text:span text:style-name="T59">import time</text:span></text:p>
      <text:p text:style-name="P71"><text:span text:style-name="T59"/></text:p>
      <text:p text:style-name="P71"><text:span text:style-name="T59">conn = sqlite3.connect("mensajes.db")</text:span></text:p>
      <text:p text:style-name="P71"><text:span text:style-name="T59">cursor = conn.cursor()</text:span></text:p>
      <text:p text:style-name="P71"><text:span text:style-name="T59"/></text:p>
      <text:p text:style-name="P71"><text:span text:style-name="T59">cursor.execute('''</text:span></text:p>
      <text:p text:style-name="P71"><text:span text:style-name="T59">CREATE TABLE IF NOT EXISTS cola (</text:span></text:p>
      <text:p text:style-name="P71"><text:span text:style-name="T59"><text:s text:c="4"/>id INTEGER PRIMARY KEY AUTOINCREMENT,</text:span></text:p>
      <text:p text:style-name="P71"><text:span text:style-name="T59"><text:s text:c="4"/>mensaje TEXT,</text:span></text:p>
      <text:p text:style-name="P71"><text:span text:style-name="T59"><text:s text:c="4"/>timestamp DATETIME DEFAULT CURRENT_TIMESTAMP</text:span></text:p>
      <text:p text:style-name="P71"><text:span text:style-name="T59">)</text:span></text:p>
      <text:p text:style-name="P71"><text:span text:style-name="T59">''')</text:span></text:p>
      <text:p text:style-name="P71"><text:soft-page-break/><text:span text:style-name="T59">conn.commit()</text:span></text:p>
      <text:p text:style-name="P71"><text:span text:style-name="T59"/></text:p>
      <text:p text:style-name="P71"><text:span text:style-name="T59">print("🕓 Esperando mensajes en mensajes.db (Modo FIFO)...")</text:span></text:p>
      <text:p text:style-name="P71"><text:span text:style-name="T59"/></text:p>
      <text:p text:style-name="P71"><text:span text:style-name="T59">try:</text:span></text:p>
      <text:p text:style-name="P71"><text:span text:style-name="T59"><text:s text:c="4"/>while True:</text:span></text:p>
      <text:p text:style-name="P71"><text:span text:style-name="T59"><text:s text:c="8"/>cursor.execute("SELECT id, mensaje FROM cola ORDER BY id ASC LIMIT 1")</text:span></text:p>
      <text:p text:style-name="P71"><text:span text:style-name="T59"><text:s text:c="8"/>fila = cursor.fetchone()</text:span></text:p>
      <text:p text:style-name="P71"><text:span text:style-name="T59"><text:s text:c="8"/></text:span></text:p>
      <text:p text:style-name="P71"><text:span text:style-name="T59"><text:s text:c="8"/>if fila:</text:span></text:p>
      <text:p text:style-name="P71"><text:span text:style-name="T59"><text:s text:c="12"/>id_msg, mensaje = fila</text:span></text:p>
      <text:p text:style-name="P71"><text:span text:style-name="T59"><text:s text:c="12"/>print(f"📥 Mensaje consumido: {mensaje} (ID: {id_msg})")</text:span></text:p>
      <text:p text:style-name="P71"><text:span text:style-name="T59"><text:s text:c="12"/></text:span></text:p>
      <text:p text:style-name="P71"><text:span text:style-name="T59"><text:s text:c="12"/>cursor.execute("DELETE FROM cola WHERE id = ?", (id_msg,))</text:span></text:p>
      <text:p text:style-name="P71"><text:span text:style-name="T59"><text:s text:c="12"/>conn.commit()</text:span></text:p>
      <text:p text:style-name="P71"><text:span text:style-name="T59"><text:s text:c="8"/>else:</text:span></text:p>
      <text:p text:style-name="P71"><text:span text:style-name="T59"><text:s text:c="12"/>time.sleep(2)</text:span></text:p>
      <text:p text:style-name="P71"><text:span text:style-name="T59"><text:s text:c="12"/></text:span></text:p>
      <text:p text:style-name="P71"><text:span text:style-name="T59">except KeyboardInterrupt:</text:span></text:p>
      <text:p text:style-name="P71"><text:span text:style-name="T59"><text:s text:c="4"/>print("\n🛑 Subscriptor detenido por el usuario.")</text:span></text:p>
      <text:p text:style-name="P71"><text:span text:style-name="T59">finally:</text:span></text:p>
      <text:p text:style-name="P71"><text:span text:style-name="T59"><text:s text:c="4"/>conn.close()</text:span></text:p>
      <text:p text:style-name="P71"><text:span text:style-name="T59"/></text:p>
      <text:p text:style-name="P71"><text:span text:style-name="T59"/></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47"><text:soft-page-break/><text:span text:style-name="T94">Ejecución y Pruebas del Sistema</text:span></text:p>
      <text:p text:style-name="P49"><text:span text:style-name="T96">Para validar la persistencia local de datos y la correcta emulación del esquema FIFO empleando archivos compartidos, realice el siguiente protocolo dentro de una misma computadora Linux (evitando el aislamiento de archivos entre la Pi y la PC):</text:span></text:p>
      <text:h text:style-name="P5" text:outline-level="4"><text:span text:style-name="T14">Fase 1: Generación de Datos en Estado Desconectado</text:span></text:h>
      <text:list text:continue-list="list3641742838" text:style-name="L9">
        <text:list-header>
          <text:p text:style-name="P80"><text:span text:style-name="Source_20_Text"><text:span text:style-name="T88">1. </text:span></text:span><text:span text:style-name="Source_20_Text"><text:span text:style-name="T70">Abra una terminal en su sistema y ejecute únicamente el script publicador:</text:span></text:span></text:p>
          <text:p text:style-name="P80"><text:span text:style-name="Source_20_Text"/></text:p>
          <text:p text:style-name="P80"><text:span text:style-name="Source_20_Text"><text:span text:style-name="T42">python3 P13/3/publicador_sqlite.py</text:span></text:span></text:p>
          <text:p text:style-name="P80"><text:span text:style-name="Source_20_Text"/></text:p>
          <text:p text:style-name="P80"><text:span text:style-name="Source_20_Text"><text:span text:style-name="T88">2. </text:span></text:span><text:span text:style-name="Source_20_Text"><text:span text:style-name="T70">Mantenga el script suscriptor apagado. Permita que el productor inserte de forma ininterrumpida de 5 a 6 registros térmicos secuenciales dentro de la base de datos mensajes.db.</text:span></text:span></text:p>
        </text:list-header>
      </text:list>
      <text:h text:style-name="P5" text:outline-level="4"><text:span text:style-name="T14">Fase 2: Inspección y Depuración Manual del Estado de la Tabla<text:line-break/></text:span></text:h>
      <text:list text:continue-numbering="true" text:style-name="L9">
        <text:list-header>
          <text:p text:style-name="P80"><text:span text:style-name="Source_20_Text"><text:span text:style-name="T90">1. </text:span></text:span><text:span text:style-name="Source_20_Text"><text:span text:style-name="T89">Abra una segunda terminal paralela en la misma ubicación del archivo y acceda directamente al motor binario de SQLite a través de la CLI:</text:span></text:span></text:p>
          <text:p text:style-name="P80"><text:span text:style-name="Source_20_Text"><text:span text:style-name="T89">sqlite3 mensajes.db</text:span></text:span></text:p>
          <text:p text:style-name="P80"><text:span text:style-name="Source_20_Text"><text:span text:style-name="T89"/></text:span></text:p>
          <text:p text:style-name="P80"><text:span text:style-name="Source_20_Text"><text:span text:style-name="T90">2. </text:span></text:span><text:span text:style-name="Source_20_Text"><text:span text:style-name="T89">Ejecute una consulta analítica para inspeccionar las tuplas acumuladas y confirme la persistencia física en disco antes de salir del entorno:</text:span></text:span></text:p>
          <text:p text:style-name="P80"><text:span text:style-name="Source_20_Text"><text:span text:style-name="T72">SQL</text:span></text:span></text:p>
          <text:p text:style-name="P80"><text:span text:style-name="Source_20_Text"><text:span text:style-name="T89">SELECT * FROM cola;</text:span></text:span></text:p>
          <text:p text:style-name="P80"><text:span text:style-name="Source_20_Text"><text:span text:style-name="T89">.quit</text:span></text:span></text:p>
        </text:list-header>
      </text:list>
      <text:p text:style-name="P81"><text:span text:style-name="T34"/></text:p>
      <text:p text:style-name="P65"><text:span text:style-name="T32"><text:line-break/><text:line-break/><text:line-break/><text:line-break/></text:span><text:soft-page-break/><text:span text:style-name="T32"><text:line-break/></text:span><text:span text:style-name="T4">Fase 3: Activación del Consumidor y Vaciado de la Cola<text:line-break/></text:span><text:span text:style-name="T30">En una terminal adicional, inicie el script encargado de la lectura destructiva:</text:span></text:p>
      <text:list text:style-name="L11">
        <text:list-header>
          <text:p text:style-name="P16"><text:span text:style-name="Source_20_Text">python3 P13/3/subscriptor_sqlite.py</text:span></text:p>
          <text:p text:style-name="P16"><text:span text:style-name="T78">Resultado esperado como Evidencia Teórica-Práctica:</text:span><text:span text:style-name="T79"> Al arrancar el </text:span><draw:frame draw:style-name="fr2" draw:name="Imagen17" text:anchor-type="char" svg:x="-0.199cm" svg:y="2.755cm" svg:width="17.59cm" svg:height="17.189cm" draw:z-index="20"><draw:image xlink:href="Pictures/10000001000002B3000002B9DDFF7B03.png" xlink:type="simple" xlink:show="embed" xlink:actuate="onLoad" draw:mime-type="image/png"/></draw:frame><text:span text:style-name="T79">suscriptor, este consumirá instantáneamente y en ráfaga todas las lecturas de temperatura rezagadas en la tabla relacional, respetando rigurosamente el orden secuencial del identificador. Una vez purgada la tabla, el suscriptor entrará de forma autónoma en un estado de sondeo pasivo cada 2 segundos, procesando los nuevos elementos al </text:span><text:soft-page-break/><text:span text:style-name="T79">momento en que el publicador confirme una nueva transacción </text:span><text:span text:style-name="Source_20_Text"><text:span text:style-name="T79">INSERT</text:span></text:span><text:span text:style-name="T79">.</text:span><text:span text:style-name="T84"><text:line-break/></text:span></text:p>
        </text:list-header>
      </text:list>
      <text:p text:style-name="Text_20_body"><draw:frame draw:style-name="fr3" draw:name="Imagen16" text:anchor-type="char" svg:x="-0.344cm" svg:y="-0.316cm" svg:width="17.436cm" svg:height="17.542cm" draw:z-index="19"><draw:image xlink:href="Pictures/10000001000002930000029749D3FFFD.png" xlink:type="simple" xlink:show="embed" xlink:actuate="onLoad" draw:mime-type="image/png"/></draw:frame><text:span text:style-name="T70"/></text:p>
      <text:p text:style-name="P82"><text:soft-page-break/><text:span text:style-name="T34"><text:line-break/><text:line-break/></text:span><draw:frame draw:style-name="fr1" draw:name="Imagen18" text:anchor-type="char" svg:width="17.436cm" svg:height="17.542cm" draw:z-index="21"><draw:image xlink:href="Pictures/1000000100000293000002974CFA18B9.png" xlink:type="simple" xlink:show="embed" xlink:actuate="onLoad" draw:mime-type="image/png"/></draw:frame><text:span text:style-name="T34"><text:line-break/><text:line-break/><text:line-break/><text:line-break/><text:line-break/><text:line-break/><text:line-break/><text:line-break/></text:span><text:soft-page-break/><text:span text:style-name="T34"><text:line-break/><text:line-break/><text:line-break/><text:line-break/><text:line-break/><text:line-break/></text:span></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81"><text:span text:style-name="T34"/></text:p>
      <text:p text:style-name="P1"><text:span text:style-name="T4">2. </text:span><text:span text:style-name="T6">Conexión</text:span></text:p>
      <text:p text:style-name="P102" loext:marker-style-name="T11"><text:soft-page-break/><text:span text:style-name="T39">[Sensor DHT11]<text:tab/><text:tab/><text:tab/><text:tab/></text:span><text:span text:style-name="T35"> <text:s/></text:span><text:span text:style-name="T38">Raspberry Pi GPIO (Pinout)</text:span><text:span text:style-name="T36"><text:line-break/><text:line-break/>VCC (5V) <text:tab/><text:tab/>◄─────────────► Pin 2 (5V Power) </text:span></text:p>
      <text:p text:style-name="P103" loext:marker-style-name="T11"><text:span text:style-name="T36"><text:s/>GND<text:tab/><text:tab/> ◄──────────────► <text:s/>Pin 6 (GND) <text:s/></text:span></text:p>
      <text:p text:style-name="P103" loext:marker-style-name="T11"><text:span text:style-name="T36"><text:s/>DATA <text:s/><text:tab/><text:tab/>◄─────────────────► <text:s/>Pin 16 (GPIO 23)<text:line-break/></text:span><draw:frame draw:style-name="fr3" draw:name="Imagen7" text:anchor-type="char" svg:x="0.337cm" svg:y="1.573cm" svg:width="16.588cm" svg:height="9.525cm" draw:z-index="2"><draw:image xlink:href="Pictures/10000000000004000000024C6A7798AC.png" xlink:type="simple" xlink:show="embed" xlink:actuate="onLoad" draw:mime-type="image/png"/></draw:frame><draw:frame draw:style-name="fr3" draw:name="Imagen3" text:anchor-type="char" svg:x="4.882cm" svg:y="11.097cm" svg:width="8.544cm" svg:height="5.828cm" draw:z-index="3"><draw:image xlink:href="Pictures/1000000100000593000003CDCBCABA29.png" xlink:type="simple" xlink:show="embed" xlink:actuate="onLoad" draw:mime-type="image/png"/></draw:frame><text:span text:style-name="T36"><text:line-break/></text:span></text:p>
      <text:p text:style-name="P105" loext:marker-style-name="T11"><text:span text:style-name="T36"><text:line-break/><text:line-break/></text:span></text:p>
      <text:p text:style-name="P105" loext:marker-style-name="T11"><text:span text:style-name="T49"/></text:p>
      <text:p text:style-name="P105" loext:marker-style-name="T11"><text:span text:style-name="T49">Conclusión:</text:span></text:p>
      <text:p text:style-name="P104" loext:marker-style-name="T11"><text:soft-page-break/><text:span text:style-name="T37"><text:line-break/>El desarrollo de esta práctica de laboratorio permitió constatar el valor de las estructuras de datos avanzadas y las APIs de visualización asíncronas en el contexto de la ingeniería de software para sistemas embebidos. El empleo de objetos collections.deque con una longitud estricta de max_len=50 demostró ser una solución ideal para implementar filtros de ventana deslizante en tiempo real, garantizando un consumo de memoria constante $O(1)$ al descartar automáticamente los registros más antiguos.Asimismo, la inclusión del backend interactivo plt.ion() en conjunto con un controlador específico para el descarte de muestras erróneas ("Lectura del sensor omitida por ruido de bus") validó la importancia del diseño defensivo en programación de bajo nivel. El software ya no colapsa ante las respuestas vacías inherentes al sensor DHT11, sino que mantiene el hilo operativo estable, aislando el comportamiento físico del bus del rendimiento gráfico de la interfaz de usuar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rial" svg:font-family="Arrial"/>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4T20:05:39.302427831</dc:date>
    <meta:editing-duration>PT3H47M43S</meta:editing-duration>
    <meta:editing-cycles>15</meta:editing-cycles>
    <meta:generator>LibreOffice/24.2.7.2$Linux_X86_64 LibreOffice_project/420$Build-2</meta:generator>
    <meta:document-statistic meta:table-count="0" meta:image-count="22" meta:object-count="0" meta:page-count="42" meta:paragraph-count="555" meta:word-count="4059" meta:character-count="30864" meta:non-whitespace-character-count="25927"/>
  </office:meta>
</office:document-meta>
</file>